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fbcda" officeooo:paragraph-rsid="001fbcda"/>
    </style:style>
    <style:style style:name="P2" style:family="paragraph" style:parent-style-name="Standard">
      <style:paragraph-properties fo:text-align="center" style:justify-single-word="false"/>
      <style:text-properties fo:font-size="36pt" officeooo:rsid="001fbcda" officeooo:paragraph-rsid="001fbcda" style:font-size-asian="31.5pt" style:font-size-complex="36pt"/>
    </style:style>
    <style:style style:name="P3" style:family="paragraph" style:parent-style-name="Standard">
      <style:paragraph-properties fo:text-align="center" style:justify-single-word="false"/>
      <style:text-properties fo:font-size="36pt" officeooo:rsid="0024d86e" officeooo:paragraph-rsid="0024d86e" style:font-size-asian="31.5pt" style:font-size-complex="36pt"/>
    </style:style>
    <style:style style:name="P4" style:family="paragraph" style:parent-style-name="Standard">
      <style:paragraph-properties fo:text-align="center" style:justify-single-word="false"/>
      <style:text-properties fo:font-size="16pt" officeooo:rsid="001fbcda" officeooo:paragraph-rsid="001fbcda" style:font-size-asian="14pt" style:font-size-complex="16pt"/>
    </style:style>
    <style:style style:name="P5" style:family="paragraph" style:parent-style-name="Standard">
      <style:paragraph-properties fo:text-align="end" style:justify-single-word="false"/>
      <style:text-properties fo:font-size="16pt" officeooo:rsid="001fbcda" officeooo:paragraph-rsid="001fbcda" style:font-size-asian="14pt" style:font-size-complex="16pt"/>
    </style:style>
    <style:style style:name="P6" style:family="paragraph" style:parent-style-name="Standard">
      <style:text-properties fo:font-size="16pt" officeooo:rsid="001fbcda" officeooo:paragraph-rsid="001fbcda" style:font-size-asian="16pt" style:font-size-complex="16pt"/>
    </style:style>
    <style:style style:name="P7" style:family="paragraph" style:parent-style-name="Standard">
      <style:paragraph-properties fo:margin-top="0cm" fo:margin-bottom="0cm" style: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writing-mode="rl-tb"/>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10" style:family="paragraph" style:parent-style-name="Standard">
      <style:paragraph-properties fo:text-align="start" style:justify-single-word="false"/>
      <style:text-properties fo:font-size="12pt" officeooo:rsid="001fbcda" officeooo:paragraph-rsid="001fbcda" style:font-size-asian="10.5pt" style:font-size-complex="12pt"/>
    </style:style>
    <style:style style:name="P11" style:family="paragraph" style:parent-style-name="Standard">
      <style:text-properties fo:font-size="12pt" officeooo:rsid="001fbcda" officeooo:paragraph-rsid="001fbcda" style:font-size-asian="10.5pt" style:font-size-complex="12pt"/>
    </style:style>
    <style:style style:name="P12" style:family="paragraph" style:parent-style-name="Standard">
      <style:text-properties fo:font-size="12pt" officeooo:rsid="002101d2" officeooo:paragraph-rsid="002101d2" style:font-size-asian="10.5pt" style:font-size-complex="12pt"/>
    </style:style>
    <style:style style:name="P13" style:family="paragraph" style:parent-style-name="Standard">
      <style:text-properties fo:font-size="12pt" officeooo:rsid="0022cd70" officeooo:paragraph-rsid="002101d2" style:font-size-asian="10.5pt" style:font-size-complex="12pt"/>
    </style:style>
    <style:style style:name="P14" style:family="paragraph" style:parent-style-name="Standard">
      <style:text-properties fo:font-size="12pt" officeooo:rsid="0022cd70" officeooo:paragraph-rsid="0022cd70" style:font-size-asian="10.5pt" style:font-size-complex="12pt"/>
    </style:style>
    <style:style style:name="P15" style:family="paragraph" style:parent-style-name="Standard">
      <style:text-properties fo:font-size="12pt" officeooo:rsid="0023b976" officeooo:paragraph-rsid="0023b976" style:font-size-asian="10.5pt" style:font-size-complex="12pt"/>
    </style:style>
    <style:style style:name="P16" style:family="paragraph" style:parent-style-name="Standard">
      <style:text-properties fo:font-size="12pt" officeooo:rsid="00240f3e" officeooo:paragraph-rsid="00240f3e" style:font-size-asian="10.5pt" style:font-size-complex="12pt"/>
    </style:style>
    <style:style style:name="P17" style:family="paragraph" style:parent-style-name="Standard">
      <style:text-properties fo:font-size="12pt" officeooo:rsid="0024ca25" officeooo:paragraph-rsid="0024ca25" style:font-size-asian="10.5pt" style:font-size-complex="12pt"/>
    </style:style>
    <style:style style:name="P18" style:family="paragraph" style:parent-style-name="Standard">
      <style:text-properties fo:font-size="12pt" officeooo:rsid="00263a06" officeooo:paragraph-rsid="00263a06" style:font-size-asian="10.5pt" style:font-size-complex="12pt"/>
    </style:style>
    <style:style style:name="P19" style:family="paragraph" style:parent-style-name="Standard">
      <style:text-properties fo:font-size="12pt" officeooo:rsid="0026f90a" officeooo:paragraph-rsid="0026f90a" style:font-size-asian="10.5pt" style:font-size-complex="12pt"/>
    </style:style>
    <style:style style:name="P20" style:family="paragraph" style:parent-style-name="Standard">
      <style:paragraph-properties fo:text-align="start" style:justify-single-word="false"/>
      <style:text-properties fo:font-size="12pt" officeooo:rsid="0028c805" officeooo:paragraph-rsid="0028c805" style:font-size-asian="10.5pt" style:font-size-complex="12pt"/>
    </style:style>
    <style:style style:name="P21" style:family="paragraph" style:parent-style-name="Standard">
      <style:text-properties fo:font-size="12pt" officeooo:rsid="00295d08" officeooo:paragraph-rsid="00295d08" style:font-size-asian="10.5pt" style:font-size-complex="12pt"/>
    </style:style>
    <style:style style:name="P22" style:family="paragraph" style:parent-style-name="Standard">
      <style:text-properties fo:font-size="12pt" officeooo:rsid="002c47a5" officeooo:paragraph-rsid="002c47a5" style:font-size-asian="10.5pt" style:font-size-complex="12pt"/>
    </style:style>
    <style:style style:name="P23" style:family="paragraph" style:parent-style-name="Standard">
      <style:paragraph-properties fo:text-align="start" style:justify-single-word="false"/>
      <style:text-properties fo:font-size="12pt" officeooo:rsid="001fbcda" officeooo:paragraph-rsid="001fbcda" style:font-size-asian="12pt" style:font-size-complex="12pt"/>
    </style:style>
    <style:style style:name="P24" style:family="paragraph" style:parent-style-name="Standard">
      <style:text-properties officeooo:paragraph-rsid="001fbcda"/>
    </style:style>
    <style:style style:name="T1" style:family="text">
      <style:text-properties officeooo:rsid="0023b976"/>
    </style:style>
    <style:style style:name="T2" style:family="text">
      <style:text-properties officeooo:rsid="00240f3e"/>
    </style:style>
    <style:style style:name="T3" style:family="text">
      <style:text-properties style:text-position="super 58%"/>
    </style:style>
    <style:style style:name="T4" style:family="text">
      <style:text-properties officeooo:rsid="0026f90a"/>
    </style:style>
    <style:style style:name="T5" style:family="text">
      <style:text-properties officeooo:rsid="0026fe36"/>
    </style:style>
    <style:style style:name="T6" style:family="text">
      <style:text-properties officeooo:rsid="002ced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eneau Corentin<text:tab/><text:tab/><text:tab/><text:tab/><text:tab/><text:tab/><text:tab/><text:tab/>Licence 2 Informatique</text:p>
      <text:p text:style-name="P1">Poulias Milan</text:p>
      <text:p text:style-name="P1">Lobry Thibault </text:p>
      <text:p text:style-name="P1"/>
      <text:p text:style-name="P1"/>
      <text:p text:style-name="P1"/>
      <text:p text:style-name="P1"/>
      <text:p text:style-name="P1"/>
      <text:p text:style-name="P2">Développement d’applications</text:p>
      <text:p text:style-name="P2">-</text:p>
      <text:p text:style-name="P2"/>
      <text:p text:style-name="P2">Plateformer</text:p>
      <text:p text:style-name="P3">Astronaut Rescuer</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5">Au Mont-Houy, UPHF</text:p>
      <text:p text:style-name="P5">Année Universitaire 2025-2026</text:p>
      <text:p text:style-name="P5">Robert Tomczak</text:p>
      <text:p text:style-name="P10"><text:soft-page-break/>résumé : </text:p>
      <text:p text:style-name="P10"/>
      <text:p text:style-name="P10">Création d’un jeu de type plateforme avec comme particularité une gravité changeante par niveau et des niveaux à double sens.</text:p>
      <text:p text:style-name="P10"/>
      <text:p text:style-name="P10">table des matières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ans le cadre du projet de soutenance du module : Développement d’applications, nous allons créer un jeu.</text:p>
      <text:p text:style-name="P10">Le projet a été mené selon une approche Agile de type SCRUM, avec un périmètre ajusté au fil des itérations. </text:p>
      <text:p text:style-name="P10"/>
      <text:p text:style-name="P20">Objectifs et finalités du projets : avoir un niveau fonctionnel avec les élément de gameplay spécifique.</text:p>
      <text:p text:style-name="P20"/>
      <text:p text:style-name="P20">Limites </text:p>
      <text:p text:style-name="P10"/>
      <text:p text:style-name="P23">Backlog : </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8">Fonctionnalité</text:p>
          </table:table-cell>
          <table:table-cell table:style-name="Tableau1.A1" office:value-type="string">
            <text:p text:style-name="P8">User story</text:p>
          </table:table-cell>
          <table:table-cell table:style-name="Tableau1.A1" office:value-type="string">
            <text:p text:style-name="P8">Critère d’acceptation</text:p>
          </table:table-cell>
        </table:table-row>
        <table:table-row table:style-name="Tableau1.1">
          <table:table-cell table:style-name="Tableau1.A1" office:value-type="string">
            <text:p text:style-name="P8">Se déplacer</text:p>
          </table:table-cell>
          <table:table-cell table:style-name="Tableau1.A1" office:value-type="string">
            <text:p text:style-name="P8">En tant que joueur, je veux me déplacer afin de parcourir le niveau</text:p>
          </table:table-cell>
          <table:table-cell table:style-name="Tableau1.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1.1">
          <table:table-cell table:style-name="Tableau1.A1" office:value-type="string">
            <text:p text:style-name="P9">Quitter le jeu</text:p>
          </table:table-cell>
          <table:table-cell table:style-name="Tableau1.A1" office:value-type="string">
            <text:p text:style-name="P8">En tant que joueur, je veux accéder à un menu afin de quitter le jeu</text:p>
          </table:table-cell>
          <table:table-cell table:style-name="Tableau1.A1" office:value-type="string">
            <text:p text:style-name="P8">Touche pour ouvrir un menu</text:p>
            <text:p text:style-name="P8">Bouton pour quitter le jeu</text:p>
          </table:table-cell>
        </table:table-row>
        <table:table-row table:style-name="Tableau1.1">
          <table:table-cell table:style-name="Tableau1.A1" office:value-type="string">
            <text:p text:style-name="P8">Gagner/Perdre</text:p>
          </table:table-cell>
          <table:table-cell table:style-name="Tableau1.A1" office:value-type="string">
            <text:p text:style-name="P8">En tant que joueur, je veux savoir quand je <text:s/>perds/gagne afin de m’adapter/progresser</text:p>
          </table:table-cell>
          <table:table-cell table:style-name="Tableau1.A1" office:value-type="string">
            <text:p text:style-name="P8">Message « Game over »/ « Gagné »</text:p>
            <text:p text:style-name="P8">Recommencer au début du niveau</text:p>
            <text:p text:style-name="P8">Pouvoir finir le niveau (niveau possible)</text:p>
          </table:table-cell>
        </table:table-row>
        <table:table-row table:style-name="Tableau1.1">
          <table:table-cell table:style-name="Tableau1.A1" office:value-type="string">
            <text:p text:style-name="P7">Différencier le personnage et les décors</text:p>
          </table:table-cell>
          <table:table-cell table:style-name="Tableau1.A1" office:value-type="string">
            <text:p text:style-name="P8">En tant que joueur, je veux reconnaitre mon personnage afin de faciliter mon expérience</text:p>
          </table:table-cell>
          <table:table-cell table:style-name="Tableau1.A1" office:value-type="string">
            <text:p text:style-name="P8">Formes différentes</text:p>
            <text:p text:style-name="P8">Couleurs différentes</text:p>
          </table:table-cell>
        </table:table-row>
        <table:table-row table:style-name="Tableau1.1">
          <table:table-cell table:style-name="Tableau1.A1" office:value-type="string">
            <text:p text:style-name="P8">Lire mon temps dans un niveau</text:p>
          </table:table-cell>
          <table:table-cell table:style-name="Tableau1.A1" office:value-type="string">
            <text:p text:style-name="P8">En tant que joueur, je veux connaitre le temps de complétion du niveau afin de connaitre ma performance</text:p>
          </table:table-cell>
          <table:table-cell table:style-name="Tableau1.A1" office:value-type="string">
            <text:p text:style-name="P8">Message à la fin du niveau avec mon temps</text:p>
            <text:p text:style-name="P8"/>
          </table:table-cell>
        </table:table-row>
        <table:table-row table:style-name="Tableau1.1">
          <table:table-cell table:style-name="Tableau1.A1" office:value-type="string">
            <text:p text:style-name="P8">Se battre contre des ennemis</text:p>
          </table:table-cell>
          <table:table-cell table:style-name="Tableau1.A1" office:value-type="string">
            <text:p text:style-name="P8">En tant que joueur, je veux rencontrer des adversaires afin d’augmenter la difficulté</text:p>
          </table:table-cell>
          <table:table-cell table:style-name="Tableau1.A1" office:value-type="string">
            <text:p text:style-name="P8">Objet pour détruire des ennemis</text:p>
            <text:p text:style-name="P8">Rencontre d’ennemis aléatoire</text:p>
          </table:table-cell>
        </table:table-row>
        <table:table-row table:style-name="Tableau1.1">
          <table:table-cell table:style-name="Tableau1.A1" office:value-type="string">
            <text:p text:style-name="P8">Ramasser des objets</text:p>
          </table:table-cell>
          <table:table-cell table:style-name="Tableau1.A1" office:value-type="string">
            <text:p text:style-name="P8">En tant que joueur, je veux ramasser des objets afin d’obtenir des bonus</text:p>
          </table:table-cell>
          <table:table-cell table:style-name="Tableau1.A1" office:value-type="string">
            <text:p text:style-name="P8">Bouton/Touche pour ramasser objet</text:p>
          </table:table-cell>
        </table:table-row>
        <table:table-row table:style-name="Tableau1.1">
          <table:table-cell table:style-name="Tableau1.A1" office:value-type="string">
            <text:p text:style-name="P8">Lire la vie restante</text:p>
          </table:table-cell>
          <table:table-cell table:style-name="Tableau1.A1" office:value-type="string">
            <text:p text:style-name="P8">En tant que joueur, je veux connaitre ma vie afin d’adapter mon style de jeu</text:p>
          </table:table-cell>
          <table:table-cell table:style-name="Tableau1.A1" office:value-type="string">
            <text:p text:style-name="P8">Boite avec une barre de vie</text:p>
            <text:p text:style-name="P8">Perdre de la vie quand un ennemi nous touche</text:p>
          </table:table-cell>
        </table:table-row>
        <table:table-row table:style-name="Tableau1.1">
          <table:table-cell table:style-name="Tableau1.A1" office:value-type="string">
            <text:p text:style-name="P8">S’immerger dans le monde</text:p>
          </table:table-cell>
          <table:table-cell table:style-name="Tableau1.A1" office:value-type="string">
            <text:p text:style-name="P8">En tant que joueur, je veux m’immerger dans le monde afin de profiter de <text:soft-page-break/>l’expérience</text:p>
          </table:table-cell>
          <table:table-cell table:style-name="Tableau1.A1" office:value-type="string">
            <text:p text:style-name="P8">Histoire intéressante</text:p>
            <text:p text:style-name="P8">Décors, ennemis, personnages, sons <text:soft-page-break/>cohérents</text:p>
            <text:p text:style-name="P8"/>
          </table:table-cell>
        </table:table-row>
        <table:table-row table:style-name="Tableau1.1">
          <table:table-cell table:style-name="Tableau1.A1" office:value-type="string">
            <text:p text:style-name="P8">Choisir son skin</text:p>
          </table:table-cell>
          <table:table-cell table:style-name="Tableau1.A1" office:value-type="string">
            <text:p text:style-name="P8">En tant que joueur, je veux personnaliser mon avatar afin d’adapter mon personnage à mes désirs</text:p>
          </table:table-cell>
          <table:table-cell table:style-name="Tableau1.A1" office:value-type="string">
            <text:p text:style-name="P8">Menu pour choisir son avatar</text:p>
            <text:p text:style-name="P8">Débloquer des skins en finissant des niveaux</text:p>
          </table:table-cell>
        </table:table-row>
        <table:table-row table:style-name="Tableau1.1">
          <table:table-cell table:style-name="Tableau1.A1" office:value-type="string">
            <text:p text:style-name="P8">Avoir une monnaie de jeu</text:p>
          </table:table-cell>
          <table:table-cell table:style-name="Tableau1.A1" office:value-type="string">
            <text:p text:style-name="P8">En tant que joueur, je veux gagner une monnaie de jeu afin d’acheter des bonus</text:p>
          </table:table-cell>
          <table:table-cell table:style-name="Tableau1.A1" office:value-type="string">
            <text:p text:style-name="P8">Menu « portemonnaie »</text:p>
            <text:p text:style-name="P8">Compteur qui évolue avec le nombre de devise ramassée</text:p>
          </table:table-cell>
        </table:table-row>
      </table:table>
      <text:p text:style-name="P10"/>
      <text:p text:style-name="P10">MVP </text:p>
      <text:p text:style-name="P10"/>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8">Fonctionnalité</text:p>
          </table:table-cell>
          <table:table-cell table:style-name="Tableau2.A1" office:value-type="string">
            <text:p text:style-name="P8">User Story</text:p>
          </table:table-cell>
          <table:table-cell table:style-name="Tableau2.A1" office:value-type="string">
            <text:p text:style-name="P8">Critères d’acceptation</text:p>
          </table:table-cell>
        </table:table-row>
        <table:table-row table:style-name="Tableau2.1">
          <table:table-cell table:style-name="Tableau2.A1" office:value-type="string">
            <text:p text:style-name="P8">Se déplacer</text:p>
          </table:table-cell>
          <table:table-cell table:style-name="Tableau2.A1" office:value-type="string">
            <text:p text:style-name="P8">En tant que joueur, je veux me déplacer afin de parcourir le niveau</text:p>
          </table:table-cell>
          <table:table-cell table:style-name="Tableau2.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2.1">
          <table:table-cell table:style-name="Tableau2.A1" office:value-type="string">
            <text:p text:style-name="P8">Quitter le jeu</text:p>
          </table:table-cell>
          <table:table-cell table:style-name="Tableau2.A1" office:value-type="string">
            <text:p text:style-name="P8">En tant que joueur, je veux accéder à un menu afin de quitter le jeu</text:p>
          </table:table-cell>
          <table:table-cell table:style-name="Tableau2.A1" office:value-type="string">
            <text:p text:style-name="P8">Touche pour ouvrir un menu</text:p>
            <text:p text:style-name="P8">Bouton pour quitter le jeu</text:p>
          </table:table-cell>
        </table:table-row>
        <table:table-row table:style-name="Tableau2.1">
          <table:table-cell table:style-name="Tableau2.A1" office:value-type="string">
            <text:p text:style-name="P8">Gagner/Perdre</text:p>
          </table:table-cell>
          <table:table-cell table:style-name="Tableau2.A1" office:value-type="string">
            <text:p text:style-name="P8">En tant que joueur, je veux savoir quand je <text:s/>perds/gagne afin de m’adapter/progresser</text:p>
          </table:table-cell>
          <table:table-cell table:style-name="Tableau2.A1" office:value-type="string">
            <text:p text:style-name="P8">Message « Game over »/ « Gagné »</text:p>
            <text:p text:style-name="P8">Recommencer au début du niveau</text:p>
            <text:p text:style-name="P8">Pouvoir finir le niveau (niveau possible)</text:p>
          </table:table-cell>
        </table:table-row>
        <table:table-row table:style-name="Tableau2.1">
          <table:table-cell table:style-name="Tableau2.A1" office:value-type="string">
            <text:p text:style-name="P8">Différencier le personnage et les décors</text:p>
          </table:table-cell>
          <table:table-cell table:style-name="Tableau2.A1" office:value-type="string">
            <text:p text:style-name="P8">En tant que joueur, je veux reconnaitre mon personnage afin de faciliter mon expérience</text:p>
          </table:table-cell>
          <table:table-cell table:style-name="Tableau2.A1" office:value-type="string">
            <text:p text:style-name="P8">Formes différentes</text:p>
            <text:p text:style-name="P8">Couleurs différentes</text:p>
          </table:table-cell>
        </table:table-row>
        <table:table-row table:style-name="Tableau2.1">
          <table:table-cell table:style-name="Tableau2.A1" office:value-type="string">
            <text:p text:style-name="P8">Lire la vie restante</text:p>
          </table:table-cell>
          <table:table-cell table:style-name="Tableau2.A1" office:value-type="string">
            <text:p text:style-name="P8">En tant que joueur, je veux connaitre ma vie afin d’adapter mon style de jeu</text:p>
          </table:table-cell>
          <table:table-cell table:style-name="Tableau2.A1" office:value-type="string">
            <text:p text:style-name="P8">Boite avec une barre de vie</text:p>
            <text:p text:style-name="P8">Perdre de la vie quand un ennemi nous touche</text:p>
          </table:table-cell>
        </table:table-row>
      </table:table>
      <text:p text:style-name="P24"/>
      <text:p text:style-name="P24"/>
      <text:p text:style-name="P24"/>
      <text:p text:style-name="P6">Astronaut Rescuer : </text:p>
      <text:p text:style-name="P6"/>
      <text:p text:style-name="P11">C’est un jeu de type plateforme <text:span text:style-name="T1">RPG </text:span>de type « die and retry » à écran unique développé sur pygame, et jouable sur PC.</text:p>
      <text:p text:style-name="P11"/>
      <text:p text:style-name="P11">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1"><text:soft-page-break/>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1">Mais depuis un certain temps, les interventions de secours se sont multipliés de manière anormale et les astronautes secourus n’ont plus aucun souvenir de ce qui leur est arrivé… </text:p>
      <text:p text:style-name="P11">Quelque chose se cache dans l’ombre de nos secouristes et ils auront alors besoin d’enquêter sur les raisons de cette anomalie.</text:p>
      <text:p text:style-name="P11">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2">(Possibilité d’ajouter des niveaux à énigme pour étendre le lore) </text:p>
      <text:p text:style-name="P13"/>
      <text:p text:style-name="P14">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4">Le niveau se finit lorsque le joueur atteint sa fusée en ayant atteint le checkpoint.</text:p>
      <text:p text:style-name="P14"/>
      <text:p text:style-name="P14"/>
      <text:p text:style-name="P14">Le joueur dispose de différentes commandes de base pour faire déplacer le personnage : </text:p>
      <text:p text:style-name="P14"/>
      <text:p text:style-name="P14">- les touches « q » et « &lt; » pour se déplacer vers la gauche,</text:p>
      <text:p text:style-name="P14">- les touches « d » et « &gt; » pour se déplacer vers la droite,</text:p>
      <text:p text:style-name="P14">- la barre espace pour sauter,</text:p>
      <text:p text:style-name="P14"/>
      <text:p text:style-name="P14">On a produit un design de personnage, de plateforme et d’arrière-plan harmonieux pour correspondre à l’univers.</text:p>
      <text:p text:style-name="P14"/>
      <text:p text:style-name="P14"/>
      <text:p text:style-name="P14">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4"/>
      <text:p text:style-name="P14">Le système de récompenses et progressions n’est pas encore établi, possibilité d’ajouter une monnaie de jeu, des skins achetables, éléments à récupérer obligatoire pour continuer le jeu, etc.</text:p>
      <text:p text:style-name="P14"/>
      <text:p text:style-name="P14">Narration et univers au dessus </text:p>
      <text:p text:style-name="P14"/>
      <text:p text:style-name="P14">Personnages : </text:p>
      <text:p text:style-name="P14"><text:tab/>Prota : Astronauts rescuers</text:p>
      <text:p text:style-name="P14"><text:tab/>Anta : Vamiante (race extraterrestre qui s’adapte à chaque gravité), roi Vamiante→ veut empêcher les humains de récupérer les ressources et les envahir </text:p>
      <text:p text:style-name="P14"/>
      <text:p text:style-name="P14">Monde : </text:p>
      <text:p text:style-name="P14">Planètes dans l’ordre : Lune, Vénus, Mars, Pluton, Saturne, Uranus (pas de surface solide mais les humains ont une technologie pour marcher dessus) , Vamiantar (seule fictive, gravité changeante en fonction du niveau) </text:p>
      <text:p text:style-name="P14"/>
      <text:p text:style-name="P15">Direction artistique : </text:p>
      <text:p text:style-name="P15">Jeu de plateforme R<text:span text:style-name="T2">PG pixelisé inspiré de Super Mario Bros.</text:span></text:p>
      <text:p text:style-name="P16"><text:soft-page-break/>Le personnage principal est un astronaute avec une tenue classique blanche comme on connaît et une visière dorée.</text:p>
      <text:p text:style-name="P16"/>
      <text:p text:style-name="P22">Sound effect : </text:p>
      <text:p text:style-name="P22">- musique de fond comme si il y avait un grand vide, un peu mystérieux, <text:span text:style-name="T6">orchestral </text:span></text:p>
      <text:p text:style-name="P22">- effet de respiration de l’astronaute par dessus la musique (léger)</text:p>
      <text:p text:style-name="P22">- son de saut et atterrissage, par exemple : « Hop ! » lors du saut, souffle plus fort au moment d’atterrir</text:p>
      <text:p text:style-name="P22">- <text:s/>son des pas sur la musique.</text:p>
      <text:p text:style-name="P16"/>
      <text:p text:style-name="P16">Moteur du jeu : PyGame.</text:p>
      <text:p text:style-name="P16">Configurations requises : Pygame, Python, un compilateur.</text:p>
      <text:p text:style-name="P15"/>
      <text:p text:style-name="P17">Structure de l’équipe : </text:p>
      <text:p text:style-name="P17"/>
      <text:p text:style-name="P17">Milan : développeur principale</text:p>
      <text:p text:style-name="P17">Thibault : pixel artiste , développeur </text:p>
      <text:p text:style-name="P17">Corentin : game designer, rapporteur, développeur </text:p>
      <text:p text:style-name="P14"/>
      <text:p text:style-name="P17">Développement en sprint : </text:p>
      <text:p text:style-name="P17"/>
      <text:p text:style-name="P17">1<text:span text:style-name="T3">er</text:span> sprint : Déplacement personnage <text:span text:style-name="T5">(Milan) </text:span>+ design personnage <text:span text:style-name="T5">(Thibault)</text:span> - <text:span text:style-name="T4">4 heures</text:span></text:p>
      <text:p text:style-name="P17">2<text:span text:style-name="T3">e</text:span> sprint : intégration design et gravité <text:span text:style-name="T5">(Milan, Corentin)</text:span> + design background <text:span text:style-name="T5">(Thibault)</text:span>– <text:span text:style-name="T4">6 heures</text:span></text:p>
      <text:p text:style-name="P17">3<text:span text:style-name="T3">e</text:span> sprint : mécanique checkpoint <text:span text:style-name="T5">(all)</text:span>– <text:span text:style-name="T4">3 heures </text:span></text:p>
      <text:p text:style-name="P18">4<text:span text:style-name="T3">e</text:span> sprint : intégration design background et personnage au centre <text:span text:style-name="T5">(all)</text:span>- <text:span text:style-name="T4">6 heures </text:span></text:p>
      <text:p text:style-name="P21">5<text:span text:style-name="T3">e</text:span> sprint : intégration fonctionnalités quitter le jeu, perdre/gagner, système de vie (all) <text:tab/></text:p>
      <text:p text:style-name="P14"><text:tab/></text:p>
      <text:p text:style-name="P14"/>
      <text:p text:style-name="P19">rendu mercredi 13 mai </text:p>
      <text:p text:style-name="P19"/>
      <text:p text:style-name="P19"><text:a xlink:type="simple" xlink:href="https://github.com/Gabbro-EXIA/PygamePLatformerDevApp" text:style-name="Internet_20_link" text:visited-style-name="Visited_20_Internet_20_Link">https://github.com/Gabbro-EXIA/PygamePLatformerDevApp</text:a></text:p>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7T10:13:15.705000000</meta:creation-date>
    <dc:date>2026-04-27T12:01:27.705000000</dc:date>
    <meta:editing-duration>PT1H48M6S</meta:editing-duration>
    <meta:editing-cycles>18</meta:editing-cycles>
    <meta:generator>LibreOffice/7.6.0.3$Windows_X86_64 LibreOffice_project/69edd8b8ebc41d00b4de3915dc82f8f0fc3b6265</meta:generator>
    <meta:document-statistic meta:table-count="2" meta:image-count="0" meta:object-count="0" meta:page-count="6" meta:paragraph-count="137" meta:word-count="1336" meta:character-count="8032" meta:non-whitespace-character-count="6790"/>
  </office:meta>
</office:document-meta>
</file>