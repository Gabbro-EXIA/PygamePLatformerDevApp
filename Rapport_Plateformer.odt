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ACC00000784EA127AEA3AE426CA.png" manifest:media-type="image/png"/>
  <manifest:file-entry manifest:full-path="Pictures/10000201000005EC00000828257B49CBA311D0A8.png" manifest:media-type="image/png"/>
  <manifest:file-entry manifest:full-path="Pictures/1000020100000870000007D42BD946A5F9290E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inherit" svg:font-family="inherit"/>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489cm" fo:margin-left="0.009cm" fo:margin-top="0cm" fo:margin-bottom="0cm" table:align="left" style:writing-mode="lr-tb"/>
    </style:style>
    <style:style style:name="Tableau1.A" style:family="table-column">
      <style:table-column-properties style:column-width="5.327cm"/>
    </style:style>
    <style:style style:name="Tableau1.B" style:family="table-column">
      <style:table-column-properties style:column-width="5.329cm"/>
    </style:style>
    <style:style style:name="Tableau1.C" style:family="table-column">
      <style:table-column-properties style:column-width="6.83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7.595cm" fo:margin-left="0.009cm" fo:margin-top="0cm" fo:margin-bottom="0cm" table:align="left" style:writing-mode="lr-tb"/>
    </style:style>
    <style:style style:name="Tableau2.A" style:family="table-column">
      <style:table-column-properties style:column-width="5.327cm"/>
    </style:style>
    <style:style style:name="Tableau2.B" style:family="table-column">
      <style:table-column-properties style:column-width="5.329cm"/>
    </style:style>
    <style:style style:name="Tableau2.C" style:family="table-column">
      <style:table-column-properties style:column-width="6.939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color="#ff0000" fo:font-size="14pt" fo:language="fr" fo:country="FR" officeooo:rsid="001d5519" style:font-size-asian="14pt" style:font-size-complex="14pt"/>
    </style:style>
    <style:style style:name="P2" style:family="paragraph" style:parent-style-name="Standard">
      <style:text-properties fo:language="fr" fo:country="FR"/>
    </style:style>
    <style:style style:name="P3" style:family="paragraph" style:parent-style-name="Standard">
      <style:text-properties fo:language="fr" fo:country="FR" officeooo:rsid="001fbcda" officeooo:paragraph-rsid="001d5519"/>
    </style:style>
    <style:style style:name="P4" style:family="paragraph" style:parent-style-name="Standard">
      <style:text-properties fo:language="fr" fo:country="FR" officeooo:paragraph-rsid="001d5519"/>
    </style:style>
    <style:style style:name="P5" style:family="paragraph" style:parent-style-name="Standard">
      <style:text-properties fo:language="fr" fo:country="FR" officeooo:rsid="0025eb6f" officeooo:paragraph-rsid="0025eb6f"/>
    </style:style>
    <style:style style:name="P6" style:family="paragraph" style:parent-style-name="Standard">
      <style:text-properties fo:language="fr" fo:country="FR" officeooo:rsid="002dbfc3" officeooo:paragraph-rsid="002dbfc3"/>
    </style:style>
    <style:style style:name="P7" style:family="paragraph" style:parent-style-name="Standard">
      <style:paragraph-properties fo:text-align="end" style:justify-single-word="false"/>
      <style:text-properties fo:font-size="16pt" fo:language="fr" fo:country="FR" officeooo:rsid="001fbcda" officeooo:paragraph-rsid="001d5519" style:font-size-asian="14pt" style:font-size-complex="16pt"/>
    </style:style>
    <style:style style:name="P8" style:family="paragraph" style:parent-style-name="Standard">
      <style:text-properties fo:font-size="16pt" fo:language="fr" fo:country="FR" officeooo:rsid="001fbcda" officeooo:paragraph-rsid="001d5519" style:font-size-asian="16pt" style:font-size-complex="16pt"/>
    </style:style>
    <style:style style:name="P9" style:family="paragraph" style:parent-style-name="Standard">
      <style:paragraph-properties fo:text-align="start" style:justify-single-word="false"/>
      <style:text-properties fo:font-size="16pt" fo:language="fr" fo:country="FR" officeooo:rsid="001fbcda" officeooo:paragraph-rsid="001d5519" style:font-size-asian="16pt" style:font-size-complex="16pt"/>
    </style:style>
    <style:style style:name="P10" style:family="paragraph" style:parent-style-name="Standard">
      <style:paragraph-properties fo:text-align="center" style:justify-single-word="false"/>
      <style:text-properties fo:font-size="36pt" fo:language="fr" fo:country="FR" officeooo:rsid="001fbcda" officeooo:paragraph-rsid="001d5519" style:font-size-asian="31.5pt" style:font-size-complex="36pt"/>
    </style:style>
    <style:style style:name="P11" style:family="paragraph" style:parent-style-name="Standard">
      <style:paragraph-properties fo:text-align="center" style:justify-single-word="false"/>
      <style:text-properties fo:font-size="36pt" fo:language="fr" fo:country="FR" officeooo:rsid="001d5519" officeooo:paragraph-rsid="001d5519" style:font-size-asian="31.5pt" style:font-size-complex="36pt"/>
    </style:style>
    <style:style style:name="P12" style:family="paragraph" style:parent-style-name="Standard">
      <style:paragraph-properties fo:text-align="start" style:justify-single-word="false"/>
      <style:text-properties fo:font-size="12pt" fo:language="fr" fo:country="FR" officeooo:rsid="001fbcda" officeooo:paragraph-rsid="001d5519" style:font-size-asian="10.5pt" style:font-size-complex="12pt"/>
    </style:style>
    <style:style style:name="P13" style:family="paragraph" style:parent-style-name="Standard">
      <style:text-properties fo:font-size="12pt" fo:language="fr" fo:country="FR" officeooo:rsid="001fbcda" officeooo:paragraph-rsid="001d5519" style:font-size-asian="10.5pt" style:font-size-complex="12pt"/>
    </style:style>
    <style:style style:name="P14" style:family="paragraph" style:parent-style-name="Standard">
      <style:paragraph-properties fo:text-align="start" style:justify-single-word="false"/>
      <style:text-properties fo:font-size="12pt" fo:language="fr" fo:country="FR" officeooo:rsid="0028c805" officeooo:paragraph-rsid="001d5519" style:font-size-asian="10.5pt" style:font-size-complex="12pt"/>
    </style:style>
    <style:style style:name="P15" style:family="paragraph" style:parent-style-name="Standard">
      <style:text-properties fo:font-size="12pt" fo:language="fr" fo:country="FR" officeooo:rsid="002101d2" officeooo:paragraph-rsid="001d5519" style:font-size-asian="10.5pt" style:font-size-complex="12pt"/>
    </style:style>
    <style:style style:name="P16" style:family="paragraph" style:parent-style-name="Standard">
      <style:text-properties fo:font-size="12pt" fo:language="fr" fo:country="FR" officeooo:rsid="0022cd70" officeooo:paragraph-rsid="001d5519" style:font-size-asian="10.5pt" style:font-size-complex="12pt"/>
    </style:style>
    <style:style style:name="P17" style:family="paragraph" style:parent-style-name="Standard">
      <style:text-properties fo:font-size="12pt" fo:language="fr" fo:country="FR" officeooo:rsid="0023b976" officeooo:paragraph-rsid="001d5519" style:font-size-asian="10.5pt" style:font-size-complex="12pt"/>
    </style:style>
    <style:style style:name="P18" style:family="paragraph" style:parent-style-name="Standard">
      <style:text-properties fo:font-size="12pt" fo:language="fr" fo:country="FR" officeooo:rsid="00240f3e" officeooo:paragraph-rsid="001d5519" style:font-size-asian="10.5pt" style:font-size-complex="12pt"/>
    </style:style>
    <style:style style:name="P19" style:family="paragraph" style:parent-style-name="Standard">
      <style:text-properties fo:font-size="12pt" fo:language="fr" fo:country="FR" officeooo:rsid="002c47a5" officeooo:paragraph-rsid="001d5519" style:font-size-asian="10.5pt" style:font-size-complex="12pt"/>
    </style:style>
    <style:style style:name="P20" style:family="paragraph" style:parent-style-name="Standard">
      <style:text-properties fo:font-size="12pt" fo:language="fr" fo:country="FR" officeooo:rsid="0024ca25" officeooo:paragraph-rsid="001d5519" style:font-size-asian="10.5pt" style:font-size-complex="12pt"/>
    </style:style>
    <style:style style:name="P21" style:family="paragraph" style:parent-style-name="Standard">
      <style:text-properties fo:font-size="12pt" fo:language="fr" fo:country="FR" officeooo:rsid="00263a06" officeooo:paragraph-rsid="001d5519" style:font-size-asian="10.5pt" style:font-size-complex="12pt"/>
    </style:style>
    <style:style style:name="P22" style:family="paragraph" style:parent-style-name="Standard">
      <style:text-properties fo:font-size="12pt" fo:language="fr" fo:country="FR" officeooo:rsid="00295d08" officeooo:paragraph-rsid="001d5519" style:font-size-asian="10.5pt" style:font-size-complex="12pt"/>
    </style:style>
    <style:style style:name="P23" style:family="paragraph" style:parent-style-name="Standard">
      <style:text-properties fo:font-size="12pt" fo:language="fr" fo:country="FR" officeooo:rsid="0026f90a" officeooo:paragraph-rsid="001d5519" style:font-size-asian="10.5pt" style:font-size-complex="12pt"/>
    </style:style>
    <style:style style:name="P24" style:family="paragraph" style:parent-style-name="Standard">
      <style:text-properties fo:font-size="12pt" fo:language="fr" fo:country="FR" officeooo:rsid="002fdaca" officeooo:paragraph-rsid="001d5519" style:font-size-asian="10.5pt" style:font-size-complex="12pt"/>
    </style:style>
    <style:style style:name="P25" style:family="paragraph" style:parent-style-name="Standard">
      <style:paragraph-properties fo:text-align="start" style:justify-single-word="false"/>
      <style:text-properties fo:font-size="12pt" fo:language="fr" fo:country="FR" officeooo:rsid="001eb781" officeooo:paragraph-rsid="001eb781" style:font-size-asian="12pt" style:font-size-complex="12pt"/>
    </style:style>
    <style:style style:name="P26" style:family="paragraph" style:parent-style-name="Standard">
      <style:text-properties fo:font-size="14pt" fo:language="fr" fo:country="FR" officeooo:rsid="001fbcda" officeooo:paragraph-rsid="001d5519" style:font-size-asian="14pt" style:font-size-complex="14pt"/>
    </style:style>
    <style:style style:name="P27" style:family="paragraph" style:parent-style-name="Standard">
      <style:text-properties fo:font-size="14pt" fo:language="fr" fo:country="FR" officeooo:rsid="001d5519" officeooo:paragraph-rsid="001d5519" style:font-size-asian="14pt" style:font-size-complex="14pt"/>
    </style:style>
    <style:style style:name="P28" style:family="paragraph" style:parent-style-name="Standard">
      <style:text-properties fo:color="#00a933" fo:font-size="14pt" fo:language="fr" fo:country="FR" style:text-underline-style="solid" style:text-underline-width="auto" style:text-underline-color="font-color" fo:font-weight="bold" officeooo:rsid="00260988" officeooo:paragraph-rsid="00260988" style:font-size-asian="14pt" style:font-weight-asian="bold" style:font-size-complex="14pt" style:font-weight-complex="bold"/>
    </style:style>
    <style:style style:name="P29" style:family="paragraph" style:parent-style-name="Standard">
      <style:text-properties fo:color="#2a6099" fo:language="fr" fo:country="FR"/>
    </style:style>
    <style:style style:name="P30" style:family="paragraph" style:parent-style-name="Standard">
      <style:text-properties fo:color="#000000" fo:font-size="12pt" fo:language="fr" fo:country="FR" style:text-underline-style="none" officeooo:rsid="002fdc94" officeooo:paragraph-rsid="002fdc94" style:font-size-asian="10.5pt" style:font-size-complex="12pt"/>
    </style:style>
    <style:style style:name="P31" style:family="paragraph" style:parent-style-name="Standard">
      <style:text-properties officeooo:paragraph-rsid="0036b695"/>
    </style:style>
    <style:style style:name="P32" style:family="paragraph" style:parent-style-name="Standard">
      <style:text-properties style:font-name="Liberation Serif" fo:font-size="11pt" fo:language="fr" fo:country="FR" officeooo:rsid="003cce53" officeooo:paragraph-rsid="003cce53" style:font-size-asian="11pt" style:font-size-complex="11pt"/>
    </style:style>
    <style:style style:name="P33" style:family="paragraph" style:parent-style-name="Standard">
      <style:text-properties style:font-name="Liberation Serif" fo:font-size="12pt" fo:language="fr" fo:country="FR" officeooo:paragraph-rsid="0036b695" style:font-size-asian="12pt" style:font-size-complex="12pt"/>
    </style:style>
    <style:style style:name="P34" style:family="paragraph" style:parent-style-name="Footer">
      <style:paragraph-properties fo:text-align="start" style:justify-single-word="false"/>
      <style:text-properties officeooo:rsid="001d5519" officeooo:paragraph-rsid="001d5519"/>
    </style:style>
    <style:style style:name="P35" style:family="paragraph" style:parent-style-name="Standard">
      <style:paragraph-properties fo:margin-top="0cm" fo:margin-bottom="0cm" loext:contextual-spacing="false" fo:line-height="100%" fo:text-align="start" style:justify-single-word="false" fo:orphans="2" fo:widows="2">
        <style:tab-stops>
          <style:tab-stop style:position="2.473cm" style:type="center"/>
        </style:tab-stops>
      </style:paragraph-properties>
      <style:text-properties style:font-name="Calibri" fo:font-size="12pt" fo:language="fr" fo:country="FR" officeooo:paragraph-rsid="001d5519" style:letter-kerning="true" style:font-name-asian="Calibri1" style:font-size-asian="12pt" style:language-asian="en" style:country-asian="US" style:font-name-complex="Arial" style:font-size-complex="12pt" style:language-complex="ar" style:country-complex="SA"/>
    </style:style>
    <style:style style:name="P36" style:family="paragraph" style:parent-style-name="Standard">
      <style:paragraph-properties fo:margin-top="0cm" fo:margin-bottom="0cm" loext:contextual-spacing="false" fo:line-height="100%" fo:text-align="start" style:justify-single-word="false" fo:orphans="2" fo:widows="2"/>
      <style:text-properties style:font-name="Calibri" fo:font-size="12pt" fo:language="fr" fo:country="FR" officeooo:paragraph-rsid="001d5519" style:letter-kerning="true" style:font-name-asian="Calibri1" style:font-size-asian="12pt" style:language-asian="en" style:country-asian="US" style:font-name-complex="Arial" style:font-size-complex="12pt" style:language-complex="ar" style:country-complex="SA"/>
    </style:style>
    <style:style style:name="P37" style:family="paragraph" style:parent-style-name="Standard">
      <style:paragraph-properties fo:margin-top="0cm" fo:margin-bottom="0cm" loext:contextual-spacing="false" fo:line-height="100%" fo:text-align="start" style:justify-single-word="false" fo:orphans="2" fo:widows="2" style:writing-mode="rl-tb"/>
      <style:text-properties style:font-name="Calibri" fo:font-size="12pt" fo:language="fr" fo:country="FR" officeooo:paragraph-rsid="001d5519" style:letter-kerning="true" style:font-name-asian="Calibri1" style:font-size-asian="12pt" style:language-asian="en" style:country-asian="US" style:font-name-complex="Arial" style:font-size-complex="12pt" style:language-complex="ar" style:country-complex="SA"/>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Contents_20_2">
      <style:paragraph-properties>
        <style:tab-stops>
          <style:tab-stop style:position="17.09cm" style:type="right" style:leader-style="dotted" style:leader-text="."/>
        </style:tab-stops>
      </style:paragraph-properties>
    </style:style>
    <style:style style:name="P40" style:family="paragraph" style:parent-style-name="Contents_20_Heading">
      <style:text-properties fo:color="#2a6099" fo:font-size="16pt" style:font-size-asian="16pt" style:font-size-complex="16pt"/>
    </style:style>
    <style:style style:name="P41" style:family="paragraph" style:parent-style-name="Contents_20_Heading">
      <style:paragraph-properties fo:text-align="center" style:justify-single-word="false"/>
      <style:text-properties fo:color="#2a6099" fo:font-size="16pt" style:font-size-asian="16pt" style:font-size-complex="16pt"/>
    </style:style>
    <style:style style:name="P42" style:family="paragraph" style:parent-style-name="Subtitle">
      <style:paragraph-properties fo:text-align="start" style:justify-single-word="false"/>
      <style:text-properties officeooo:paragraph-rsid="0029b515"/>
    </style:style>
    <style:style style:name="P43" style:family="paragraph" style:parent-style-name="Text_20_body">
      <style:text-properties fo:color="#000000" fo:font-size="12pt" fo:language="fr" fo:country="FR" style:text-underline-style="none" officeooo:rsid="002f16a2" officeooo:paragraph-rsid="002f16a2" style:font-size-asian="10.5pt" style:font-size-complex="12pt"/>
    </style:style>
    <style:style style:name="P44" style:family="paragraph" style:parent-style-name="Text_20_body">
      <style:text-properties officeooo:rsid="003dbf95" officeooo:paragraph-rsid="00397bc4"/>
    </style:style>
    <style:style style:name="P45" style:family="paragraph" style:parent-style-name="Text_20_body">
      <style:text-properties style:font-name="Liberation Serif" fo:font-size="12pt" fo:language="fr" fo:country="FR" style:font-size-asian="12pt" style:font-size-complex="12pt"/>
    </style:style>
    <style:style style:name="P46" style:family="paragraph" style:parent-style-name="Text_20_body">
      <style:text-properties style:font-name="Liberation Serif" fo:font-size="12pt" fo:language="fr" fo:country="FR" officeooo:rsid="0044049d" officeooo:paragraph-rsid="0044049d" style:font-size-asian="12pt" style:font-size-complex="12pt"/>
    </style:style>
    <style:style style:name="P47" style:family="paragraph" style:parent-style-name="Title">
      <style:text-properties fo:color="#2a6099"/>
    </style:style>
    <style:style style:name="P48" style:family="paragraph" style:parent-style-name="Heading_20_1">
      <style:text-properties fo:font-size="16pt" style:text-underline-style="solid" style:text-underline-width="auto" style:text-underline-color="font-color" style:font-size-asian="16pt" style:font-size-complex="16pt"/>
    </style:style>
    <style:style style:name="P49" style:family="paragraph" style:parent-style-name="Heading_20_1">
      <style:text-properties fo:font-size="16pt" style:font-size-asian="16pt" style:font-size-complex="16pt"/>
    </style:style>
    <style:style style:name="P50" style:family="paragraph" style:parent-style-name="Heading_20_1">
      <style:text-properties fo:color="#ff0000" fo:font-size="16pt" style:text-underline-style="solid" style:text-underline-width="auto" style:text-underline-color="font-color" style:font-size-asian="16pt" style:font-size-complex="16pt"/>
    </style:style>
    <style:style style:name="P51" style:family="paragraph" style:parent-style-name="Heading_20_2">
      <style:text-properties officeooo:paragraph-rsid="002dbfc3"/>
    </style:style>
    <style:style style:name="P52" style:family="paragraph" style:parent-style-name="Heading_20_2">
      <style:text-properties fo:font-weight="normal" style:font-weight-asian="normal" style:font-weight-complex="normal"/>
    </style:style>
    <style:style style:name="P53" style:family="paragraph" style:parent-style-name="Heading_20_2">
      <style:text-properties officeooo:paragraph-rsid="0037b339"/>
    </style:style>
    <style:style style:name="P54" style:family="paragraph" style:parent-style-name="Heading_20_2">
      <style:text-properties fo:color="#00a933" style:text-underline-style="solid" style:text-underline-width="auto" style:text-underline-color="font-color" fo:font-weight="normal" style:font-weight-asian="normal" style:font-weight-complex="normal"/>
    </style:style>
    <style:style style:name="P55" style:family="paragraph" style:parent-style-name="Heading_20_2">
      <style:text-properties fo:language="fr" fo:country="FR"/>
    </style:style>
    <style:style style:name="P56" style:family="paragraph" style:parent-style-name="Standard">
      <style:text-properties fo:language="fr" fo:country="FR" officeooo:rsid="002fdc94" officeooo:paragraph-rsid="002fdc94"/>
    </style:style>
    <style:style style:name="P57" style:family="paragraph" style:parent-style-name="Standard">
      <style:paragraph-properties fo:text-align="start" style:justify-single-word="false"/>
      <style:text-properties fo:color="#00a933" fo:font-size="16pt" fo:language="fr" fo:country="FR" style:text-underline-style="solid" style:text-underline-width="auto" style:text-underline-color="font-color" fo:font-weight="normal" officeooo:rsid="0021a49b" officeooo:paragraph-rsid="001eb781" style:font-size-asian="16pt" style:font-weight-asian="normal" style:font-size-complex="16pt" style:font-weight-complex="normal"/>
    </style:style>
    <style:style style:name="P58" style:family="paragraph" style:parent-style-name="Standard">
      <style:text-properties fo:color="#00a933" fo:font-size="16pt" fo:language="fr" fo:country="FR" style:text-underline-style="solid" style:text-underline-width="auto" style:text-underline-color="font-color" fo:font-weight="normal" officeooo:rsid="001eb781" officeooo:paragraph-rsid="001eb781" style:font-size-asian="14pt" style:font-weight-asian="normal" style:font-size-complex="16pt" style:font-weight-complex="normal"/>
    </style:style>
    <style:style style:name="P59" style:family="paragraph" style:parent-style-name="Standard">
      <style:text-properties fo:color="#00a933" fo:font-size="16pt" fo:language="fr" fo:country="FR" style:text-underline-style="solid" style:text-underline-width="auto" style:text-underline-color="font-color" fo:font-weight="normal" officeooo:rsid="00260988" officeooo:paragraph-rsid="00260988" style:font-size-asian="14pt" style:font-weight-asian="normal" style:font-size-complex="16pt" style:font-weight-complex="normal"/>
    </style:style>
    <style:style style:name="P60" style:family="paragraph" style:parent-style-name="Standard">
      <style:paragraph-properties fo:text-align="start" style:justify-single-word="false"/>
      <style:text-properties fo:color="#00a933" fo:font-style="normal" style:text-underline-style="solid" style:text-underline-width="auto" style:text-underline-color="font-color" officeooo:rsid="0021a49b" officeooo:paragraph-rsid="001d5519" style:font-style-asian="normal" style:font-style-complex="normal"/>
    </style:style>
    <style:style style:name="P61" style:family="paragraph" style:parent-style-name="Standard">
      <style:text-properties fo:color="#00a933" fo:font-size="14pt" fo:language="fr" fo:country="FR" style:text-underline-style="solid" style:text-underline-width="auto" style:text-underline-color="font-color" officeooo:rsid="001eb781" officeooo:paragraph-rsid="001d5519" style:font-size-asian="14pt" style:font-size-complex="14pt"/>
    </style:style>
    <style:style style:name="P62" style:family="paragraph" style:parent-style-name="Standard">
      <style:text-properties fo:color="#00a933" fo:font-size="14pt" fo:language="fr" fo:country="FR" style:text-underline-style="solid" style:text-underline-width="auto" style:text-underline-color="font-color" fo:font-weight="normal" officeooo:rsid="001eb781" officeooo:paragraph-rsid="001d5519" style:font-size-asian="14pt" style:font-weight-asian="normal" style:font-size-complex="14pt" style:font-weight-complex="normal"/>
    </style:style>
    <style:style style:name="P63" style:family="paragraph" style:parent-style-name="Standard">
      <style:text-properties fo:color="#00a933" fo:font-size="14pt" fo:language="fr" fo:country="FR" style:text-underline-style="solid" style:text-underline-width="auto" style:text-underline-color="font-color" fo:font-weight="normal" officeooo:rsid="002fdaca" officeooo:paragraph-rsid="002fdc94" style:font-size-asian="14pt" style:font-weight-asian="normal" style:font-size-complex="14pt" style:font-weight-complex="normal"/>
    </style:style>
    <style:style style:name="P64" style:family="paragraph" style:parent-style-name="Standard">
      <style:text-properties fo:color="#00a933" fo:font-size="14pt" fo:language="fr" fo:country="FR" style:text-underline-style="solid" style:text-underline-width="auto" style:text-underline-color="font-color" fo:font-weight="normal" officeooo:rsid="00260988" officeooo:paragraph-rsid="00260988" style:font-size-asian="14pt" style:font-weight-asian="normal" style:font-size-complex="14pt" style:font-weight-complex="normal"/>
    </style:style>
    <style:style style:name="P65" style:family="paragraph" style:parent-style-name="Standard">
      <style:text-properties fo:color="#00a933" fo:font-size="14pt" fo:language="fr" fo:country="FR" style:text-underline-style="none" fo:font-weight="normal" officeooo:rsid="002fdc94" officeooo:paragraph-rsid="002fdc94" style:font-size-asian="14pt" style:font-weight-asian="normal" style:font-size-complex="14pt" style:font-weight-complex="normal"/>
    </style:style>
    <style:style style:name="P66" style:family="paragraph" style:parent-style-name="Standard">
      <style:text-properties fo:color="#ff0000" fo:font-size="16pt" fo:language="fr" fo:country="FR" style:text-underline-style="solid" style:text-underline-width="auto" style:text-underline-color="font-color" fo:font-weight="bold" officeooo:rsid="001eb781" officeooo:paragraph-rsid="001eb781" style:font-size-asian="16pt" style:font-weight-asian="bold" style:font-size-complex="16pt" style:font-weight-complex="bold"/>
    </style:style>
    <style:style style:name="P67" style:family="paragraph" style:parent-style-name="Standard">
      <style:text-properties fo:font-size="14pt" fo:language="fr" fo:country="FR" fo:font-weight="normal" officeooo:rsid="001eb781" officeooo:paragraph-rsid="001d5519" style:font-size-asian="14pt" style:font-weight-asian="normal" style:font-size-complex="14pt" style:font-weight-complex="normal"/>
    </style:style>
    <style:style style:name="P68" style:family="paragraph" style:parent-style-name="Standard">
      <style:text-properties fo:font-size="14pt" fo:language="fr" fo:country="FR" style:font-size-asian="14pt" style:font-size-complex="14pt"/>
    </style:style>
    <style:style style:name="P69" style:family="paragraph" style:parent-style-name="Standard">
      <style:text-properties fo:font-size="12pt" fo:language="fr" fo:country="FR" officeooo:rsid="002fdaca" officeooo:paragraph-rsid="001d5519" style:font-size-asian="10.5pt" style:font-size-complex="12pt"/>
    </style:style>
    <style:style style:name="P70" style:family="paragraph" style:parent-style-name="Standard">
      <style:text-properties fo:color="#000000" style:font-name="Liberation Serif" fo:font-size="11pt" fo:language="fr" fo:country="FR" style:text-underline-style="none" fo:font-weight="normal" officeooo:rsid="00397bc4" officeooo:paragraph-rsid="00397bc4" style:font-size-asian="11pt" style:font-weight-asian="normal" style:font-size-complex="11pt" style:font-weight-complex="normal"/>
    </style:style>
    <style:style style:name="P71" style:family="paragraph" style:parent-style-name="Standard">
      <style:text-properties fo:color="#000000" style:font-name="Liberation Serif" fo:font-size="12pt" fo:language="fr" fo:country="FR" style:text-underline-style="none" fo:font-weight="normal" officeooo:rsid="00260988" officeooo:paragraph-rsid="004a57b9" style:font-size-asian="12pt" style:font-weight-asian="normal" style:font-size-complex="12pt" style:font-weight-complex="normal"/>
    </style:style>
    <style:style style:name="P72" style:family="paragraph" style:parent-style-name="Standard">
      <style:text-properties fo:color="#000000" style:font-name="Liberation Serif" fo:font-size="12pt" fo:language="fr" fo:country="FR" style:text-underline-style="none" officeooo:paragraph-rsid="004a57b9" style:font-size-asian="12pt" style:font-size-complex="12pt"/>
    </style:style>
    <style:style style:name="P73" style:family="paragraph" style:parent-style-name="Standard">
      <style:text-properties fo:color="#000000" fo:font-size="12pt" style:text-underline-style="none" fo:font-weight="normal" officeooo:paragraph-rsid="0036b695" style:font-size-asian="12pt" style:font-weight-asian="normal" style:font-size-complex="12pt" style:font-weight-complex="normal"/>
    </style:style>
    <style:style style:name="P74" style:family="paragraph" style:parent-style-name="Standard" style:master-page-name="Standard">
      <style:paragraph-properties style:page-number="auto"/>
      <style:text-properties style:font-name="Liberation Serif" fo:font-size="12pt" fo:language="fr" fo:country="FR" officeooo:paragraph-rsid="0036b695" style:font-size-asian="12pt" style:font-size-complex="12pt"/>
    </style:style>
    <style:style style:name="P75" style:family="paragraph" style:parent-style-name="Text_20_body">
      <style:text-properties fo:color="#00a933" fo:font-size="14pt" style:text-underline-style="solid" style:text-underline-width="auto" style:text-underline-color="font-color" fo:font-weight="normal" officeooo:rsid="002fdaca" style:font-size-asian="14pt" style:font-weight-asian="normal" style:font-size-complex="14pt" style:font-weight-complex="normal"/>
    </style:style>
    <style:style style:name="P76" style:family="paragraph" style:parent-style-name="Text_20_body">
      <style:text-properties fo:color="#00a933"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P77" style:family="paragraph" style:parent-style-name="Text_20_body">
      <style:text-properties fo:color="#00a933" fo:font-size="14pt" fo:language="fr" fo:country="FR" style:text-underline-style="solid" style:text-underline-width="auto" style:text-underline-color="font-color" fo:font-weight="normal" officeooo:rsid="002fdaca" style:font-size-asian="14pt" style:font-weight-asian="normal" style:font-size-complex="14pt" style:font-weight-complex="normal"/>
    </style:style>
    <style:style style:name="P78" style:family="paragraph" style:parent-style-name="Text_20_body">
      <style:text-properties fo:color="#000000" fo:font-size="12pt" fo:language="fr" fo:country="FR" style:text-underline-style="none" fo:font-weight="normal" officeooo:rsid="002fdaca" officeooo:paragraph-rsid="002f16a2" style:font-size-asian="10.5pt" style:font-weight-asian="normal" style:font-size-complex="12pt" style:font-weight-complex="normal"/>
    </style:style>
    <style:style style:name="P79" style:family="paragraph" style:parent-style-name="Text_20_body">
      <style:text-properties fo:color="#000000" style:font-name="Liberation Serif" fo:font-size="12pt" fo:language="fr" fo:country="FR" style:text-underline-style="none" officeooo:paragraph-rsid="004a57b9" style:font-size-asian="12pt" style:font-size-complex="12pt"/>
    </style:style>
    <style:style style:name="P80" style:family="paragraph" style:parent-style-name="Text_20_body">
      <style:text-properties style:font-name="Liberation Serif" fo:font-size="12pt" fo:language="fr" fo:country="FR" officeooo:rsid="0046827a" officeooo:paragraph-rsid="0046827a" style:font-size-asian="12pt" style:font-size-complex="12pt"/>
    </style:style>
    <style:style style:name="P81" style:family="paragraph">
      <style:paragraph-properties fo:text-align="center"/>
    </style:style>
    <style:style style:name="T1" style:family="text">
      <style:text-properties fo:color="#00a933" fo:font-size="14pt" fo:font-weight="bold" style:font-size-asian="14pt" style:font-weight-asian="bold" style:font-size-complex="14pt" style:font-weight-complex="bold"/>
    </style:style>
    <style:style style:name="T2" style:family="text">
      <style:text-properties fo:color="#00a933" fo:font-size="14pt" style:text-underline-style="solid" style:text-underline-width="auto" style:text-underline-color="font-color" style:font-size-asian="14pt" style:font-size-complex="14pt"/>
    </style:style>
    <style:style style:name="T3" style:family="text">
      <style:text-properties fo:color="#00a933" fo:font-size="14pt" style:text-underline-style="solid" style:text-underline-width="auto" style:text-underline-color="font-color" officeooo:rsid="001eb781" style:font-size-asian="14pt" style:font-size-complex="14pt"/>
    </style:style>
    <style:style style:name="T4" style:family="text">
      <style:text-properties fo:color="#00a933" fo:font-size="14pt" style:text-underline-style="solid" style:text-underline-width="auto" style:text-underline-color="font-color" officeooo:rsid="0021a49b" style:font-size-asian="14pt" style:font-size-complex="14pt"/>
    </style:style>
    <style:style style:name="T5" style:family="text">
      <style:text-properties fo:color="#00a933" fo:font-size="14pt" style:text-underline-style="solid" style:text-underline-width="auto" style:text-underline-color="font-color" fo:font-weight="normal" style:font-size-asian="14pt" style:font-weight-asian="normal" style:font-size-complex="14pt" style:font-weight-complex="normal"/>
    </style:style>
    <style:style style:name="T6" style:family="text">
      <style:text-properties fo:color="#00a933" fo:font-size="14pt" style:text-underline-style="solid" style:text-underline-width="auto" style:text-underline-color="font-color" fo:font-weight="normal" officeooo:rsid="001eb781" style:font-size-asian="14pt" style:font-weight-asian="normal" style:font-size-complex="14pt" style:font-weight-complex="normal"/>
    </style:style>
    <style:style style:name="T7" style:family="text">
      <style:text-properties fo:color="#00a933" fo:font-size="14pt" style:text-underline-style="solid" style:text-underline-width="auto" style:text-underline-color="font-color" fo:font-weight="normal" officeooo:rsid="0025eb6f" style:font-size-asian="14pt" style:font-weight-asian="normal" style:font-size-complex="14pt" style:font-weight-complex="normal"/>
    </style:style>
    <style:style style:name="T8" style:family="text">
      <style:text-properties fo:color="#00a933" fo:font-size="14pt" style:text-underline-style="solid" style:text-underline-width="auto" style:text-underline-color="font-color" fo:font-weight="normal" officeooo:rsid="002fdaca" style:font-size-asian="14pt" style:font-weight-asian="normal" style:font-size-complex="14pt" style:font-weight-complex="normal"/>
    </style:style>
    <style:style style:name="T9" style:family="text">
      <style:text-properties fo:color="#00a933" fo:font-size="14pt" style:text-underline-style="solid" style:text-underline-width="auto" style:text-underline-color="font-color" fo:font-weight="normal" officeooo:rsid="002dbfc3" style:font-size-asian="14pt" style:font-weight-asian="normal" style:font-size-complex="14pt" style:font-weight-complex="normal"/>
    </style:style>
    <style:style style:name="T10" style:family="text">
      <style:text-properties fo:color="#00a933" fo:font-size="14pt" style:text-underline-style="solid" style:text-underline-width="auto" style:text-underline-color="font-color" fo:font-weight="normal" officeooo:rsid="002fdc94" style:font-size-asian="14pt" style:font-weight-asian="normal" style:font-size-complex="14pt" style:font-weight-complex="normal"/>
    </style:style>
    <style:style style:name="T11" style:family="text">
      <style:text-properties fo:color="#00a933" fo:font-size="14pt" style:text-underline-style="solid" style:text-underline-width="auto" style:text-underline-color="font-color" fo:font-weight="normal" officeooo:rsid="00352cb6" style:font-size-asian="14pt" style:font-weight-asian="normal" style:font-size-complex="14pt" style:font-weight-complex="normal"/>
    </style:style>
    <style:style style:name="T12" style:family="text">
      <style:text-properties fo:color="#00a933" fo:font-size="14pt" fo:language="fr" fo:country="FR" style:text-underline-style="solid" style:text-underline-width="auto" style:text-underline-color="font-color" fo:font-weight="normal" officeooo:rsid="001eb781" style:font-size-asian="14pt" style:font-weight-asian="normal" style:font-size-complex="14pt" style:font-weight-complex="normal"/>
    </style:style>
    <style:style style:name="T13" style:family="text">
      <style:text-properties fo:color="#00a933" fo:font-size="14pt" fo:language="fr" fo:country="FR" style:text-underline-style="none" fo:font-weight="normal" officeooo:rsid="002fdc94" style:font-size-asian="14pt" style:font-weight-asian="normal" style:font-size-complex="14pt" style:font-weight-complex="normal"/>
    </style:style>
    <style:style style:name="T14" style:family="text">
      <style:text-properties fo:color="#00a933" fo:font-size="14pt" style:text-underline-style="none" fo:font-weight="normal" style:font-size-asian="14pt" style:font-weight-asian="normal" style:font-size-complex="14pt" style:font-weight-complex="normal"/>
    </style:style>
    <style:style style:name="T15" style:family="text">
      <style:text-properties fo:color="#00a933" fo:font-size="14pt" style:text-underline-style="none" fo:font-weight="normal" officeooo:rsid="001eb781" style:font-size-asian="14pt" style:font-weight-asian="normal" style:font-size-complex="14pt" style:font-weight-complex="normal"/>
    </style:style>
    <style:style style:name="T16" style:family="text">
      <style:text-properties fo:color="#00a933" fo:font-size="14pt" style:text-underline-style="none" fo:font-weight="normal" officeooo:rsid="002fdc94" style:font-size-asian="14pt" style:font-weight-asian="normal" style:font-size-complex="14pt" style:font-weight-complex="normal"/>
    </style:style>
    <style:style style:name="T17" style:family="text">
      <style:text-properties fo:color="#00a933" fo:font-size="14pt" fo:font-style="normal" style:text-underline-style="solid" style:text-underline-width="auto" style:text-underline-color="font-color" fo:font-weight="normal" officeooo:rsid="0049c3a0" style:font-size-asian="14pt" style:font-style-asian="normal" style:font-weight-asian="normal" style:font-size-complex="14pt" style:font-style-complex="normal" style:font-weight-complex="normal"/>
    </style:style>
    <style:style style:name="T18" style:family="text">
      <style:text-properties fo:color="#00a933" fo:font-weight="bold" officeooo:rsid="001d5519" style:font-weight-asian="bold" style:font-weight-complex="bold"/>
    </style:style>
    <style:style style:name="T19" style:family="text">
      <style:text-properties fo:color="#00a933" officeooo:rsid="001d5519"/>
    </style:style>
    <style:style style:name="T20" style:family="text">
      <style:text-properties fo:color="#00a933" style:text-position="super 58%" fo:font-size="14pt" style:text-underline-style="solid" style:text-underline-width="auto" style:text-underline-color="font-color" style:font-size-asian="14pt" style:font-size-complex="14pt"/>
    </style:style>
    <style:style style:name="T21" style:family="text">
      <style:text-properties fo:color="#00a933" style:text-position="super 58%" fo:font-size="14pt" style:text-underline-style="solid" style:text-underline-width="auto" style:text-underline-color="font-color" fo:font-weight="normal" officeooo:rsid="002fdaca" style:font-size-asian="14pt" style:font-weight-asian="normal" style:font-size-complex="14pt" style:font-weight-complex="normal"/>
    </style:style>
    <style:style style:name="T22" style:family="text">
      <style:text-properties fo:color="#00a933" fo:font-style="normal" style:text-underline-style="solid" style:text-underline-width="auto" style:text-underline-color="font-color" style:font-style-asian="normal" style:font-style-complex="normal"/>
    </style:style>
    <style:style style:name="T23" style:family="text">
      <style:text-properties fo:color="#00a933" fo:font-style="normal" style:text-underline-style="solid" style:text-underline-width="auto" style:text-underline-color="font-color" officeooo:rsid="0021a49b" style:font-style-asian="normal" style:font-style-complex="normal"/>
    </style:style>
    <style:style style:name="T24" style:family="text">
      <style:text-properties fo:color="#00a933" fo:font-style="normal" style:text-underline-style="solid" style:text-underline-width="auto" style:text-underline-color="font-color" fo:font-weight="normal" style:font-style-asian="normal" style:font-weight-asian="normal" style:font-style-complex="normal" style:font-weight-complex="normal"/>
    </style:style>
    <style:style style:name="T25" style:family="text">
      <style:text-properties fo:color="#00a933" fo:font-style="normal" style:text-underline-style="none" officeooo:rsid="0021a49b" style:font-style-asian="normal" style:font-style-complex="normal"/>
    </style:style>
    <style:style style:name="T26" style:family="text">
      <style:text-properties fo:color="#00a933" style:font-name="Liberation Sans" fo:font-size="14pt" style:text-underline-style="solid" style:text-underline-width="auto" style:text-underline-color="font-color" officeooo:rsid="0029f4be" style:font-name-asian="Microsoft YaHei" style:font-size-asian="14pt" style:font-name-complex="Lucida Sans" style:font-size-complex="14pt"/>
    </style:style>
    <style:style style:name="T27" style:family="text">
      <style:text-properties fo:color="#00a933" style:font-name="Liberation Sans" fo:font-size="14pt" style:text-underline-style="solid" style:text-underline-width="auto" style:text-underline-color="font-color" fo:font-weight="normal" officeooo:rsid="002fdc94" style:font-name-asian="Microsoft YaHei" style:font-size-asian="14pt" style:font-weight-asian="normal" style:font-name-complex="Lucida Sans" style:font-size-complex="14pt" style:font-weight-complex="normal"/>
    </style:style>
    <style:style style:name="T28" style:family="text">
      <style:text-properties fo:color="#000000" officeooo:rsid="001d5519"/>
    </style:style>
    <style:style style:name="T29" style:family="text">
      <style:text-properties fo:color="#000000" style:font-name="Liberation Serif" fo:font-size="12pt" fo:language="fr" fo:country="FR" style:text-underline-style="none" fo:font-weight="normal" officeooo:rsid="00397bc4" style:font-size-asian="12pt" style:font-weight-asian="normal" style:font-size-complex="12pt" style:font-weight-complex="normal"/>
    </style:style>
    <style:style style:name="T30" style:family="text">
      <style:text-properties fo:language="fr" fo:country="FR"/>
    </style:style>
    <style:style style:name="T31" style:family="text">
      <style:text-properties fo:language="fr" fo:country="FR" officeooo:rsid="001fbcda"/>
    </style:style>
    <style:style style:name="T32" style:family="text">
      <style:text-properties fo:language="fr" fo:country="FR" style:text-underline-style="none"/>
    </style:style>
    <style:style style:name="T33" style:family="text">
      <style:text-properties fo:language="fr" fo:country="FR" officeooo:rsid="0037b339"/>
    </style:style>
    <style:style style:name="T34" style:family="text">
      <style:text-properties fo:color="#ff0000" style:text-underline-style="solid" style:text-underline-width="auto" style:text-underline-color="font-color"/>
    </style:style>
    <style:style style:name="T35" style:family="text">
      <style:text-properties fo:color="#ff0000" style:text-underline-style="solid" style:text-underline-width="auto" style:text-underline-color="font-color" officeooo:rsid="0029f4be"/>
    </style:style>
    <style:style style:name="T36" style:family="text">
      <style:text-properties fo:color="#ff0000" fo:font-weight="bold" style:font-weight-asian="bold" style:font-weight-complex="bold"/>
    </style:style>
    <style:style style:name="T37" style:family="text">
      <style:text-properties officeooo:rsid="00351638"/>
    </style:style>
    <style:style style:name="T38" style:family="text">
      <style:text-properties officeooo:rsid="0023b976"/>
    </style:style>
    <style:style style:name="T39" style:family="text">
      <style:text-properties officeooo:rsid="00240f3e"/>
    </style:style>
    <style:style style:name="T40" style:family="text">
      <style:text-properties officeooo:rsid="002ced40"/>
    </style:style>
    <style:style style:name="T41" style:family="text">
      <style:text-properties style:text-position="super 58%"/>
    </style:style>
    <style:style style:name="T42" style:family="text">
      <style:text-properties style:text-position="super 58%" fo:font-size="16pt" style:font-size-asian="16pt" style:font-size-complex="16pt"/>
    </style:style>
    <style:style style:name="T43" style:family="text">
      <style:text-properties officeooo:rsid="0026fe36"/>
    </style:style>
    <style:style style:name="T44" style:family="text">
      <style:text-properties officeooo:rsid="0026f90a"/>
    </style:style>
    <style:style style:name="T45" style:family="text">
      <style:text-properties officeooo:rsid="0030d8a7"/>
    </style:style>
    <style:style style:name="T46" style:family="text">
      <style:text-properties officeooo:rsid="00327bf4"/>
    </style:style>
    <style:style style:name="T47" style:family="text">
      <style:text-properties fo:font-size="16pt" style:font-size-asian="16pt" style:font-size-complex="16pt"/>
    </style:style>
    <style:style style:name="T48" style:family="text">
      <style:text-properties fo:font-size="16pt" fo:font-style="normal" style:font-size-asian="16pt" style:font-style-asian="normal" style:font-size-complex="16pt" style:font-style-complex="normal"/>
    </style:style>
    <style:style style:name="T49" style:family="text">
      <style:text-properties officeooo:rsid="001eb781"/>
    </style:style>
    <style:style style:name="T50" style:family="text">
      <style:text-properties fo:font-size="12pt" fo:language="fr" fo:country="FR" style:text-underline-style="none" fo:font-weight="normal" officeooo:rsid="001eb781" style:font-size-asian="10.5pt" style:font-weight-asian="normal" style:font-size-complex="12pt" style:font-weight-complex="normal"/>
    </style:style>
    <style:style style:name="T51" style:family="text">
      <style:text-properties style:text-underline-style="none"/>
    </style:style>
    <style:style style:name="T52" style:family="text">
      <style:text-properties fo:font-size="14pt" style:font-size-asian="14pt" style:font-size-complex="14pt"/>
    </style:style>
    <style:style style:name="T53" style:family="text">
      <style:text-properties fo:font-size="14pt" fo:font-style="normal" style:text-underline-style="solid" style:text-underline-width="auto" style:text-underline-color="font-color" fo:font-weight="normal" officeooo:rsid="0049c3a0" style:font-size-asian="14pt" style:font-style-asian="normal" style:font-weight-asian="normal" style:font-size-complex="14pt" style:font-style-complex="normal"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2fdaca" style:font-weight-asian="normal" style:font-weight-complex="normal"/>
    </style:style>
    <style:style style:name="T56" style:family="text">
      <style:text-properties fo:font-weight="normal" officeooo:rsid="002fdc94" style:font-weight-asian="normal" style:font-weight-complex="normal"/>
    </style:style>
    <style:style style:name="T57" style:family="text">
      <style:text-properties fo:font-style="italic" style:font-style-asian="italic" style:font-style-complex="italic"/>
    </style:style>
    <style:style style:name="T58" style:family="text">
      <style:text-properties style:font-name="Liberation Serif" fo:language="fr" fo:country="FR" officeooo:rsid="00260988"/>
    </style:style>
    <style:style style:name="T59" style:family="text">
      <style:text-properties style:font-name="Liberation Serif" fo:font-size="12pt" fo:language="fr" fo:country="FR" style:font-size-asian="12pt" style:font-size-complex="12pt"/>
    </style:style>
    <style:style style:name="T60" style:family="text">
      <style:text-properties officeooo:rsid="003b62d8"/>
    </style:style>
    <style:style style:name="T61" style:family="text">
      <style:text-properties officeooo:rsid="00445cb8"/>
    </style:style>
    <style:style style:name="T62" style:family="text">
      <style:text-properties officeooo:rsid="0046827a"/>
    </style:style>
    <style:style style:name="T63" style:family="text">
      <style:text-properties fo:font-variant="normal" fo:text-transform="none" style:text-line-through-style="none" style:text-line-through-type="none" style:font-name="inherit" fo:font-size="12pt" fo:letter-spacing="normal" fo:font-style="normal" style:text-underline-style="solid" style:text-underline-width="auto" style:text-underline-color="font-color" fo:font-weight="normal" style:text-blinking="false"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areneau Corentin<text:tab/><text:tab/><text:tab/><text:tab/><text:tab/><text:tab/><text:tab/><text:tab/>Licence 2 Informatique</text:p>
      <text:p text:style-name="P3">Poulias Milan</text:p>
      <text:p text:style-name="P3">Lobry Thibault </text:p>
      <text:p text:style-name="P3"/>
      <text:p text:style-name="P3"/>
      <text:p text:style-name="P3"/>
      <text:p text:style-name="P3"/>
      <text:p text:style-name="P3"/>
      <text:p text:style-name="P3"/>
      <text:p text:style-name="P3"/>
      <text:p text:style-name="P3"/>
      <text:p text:style-name="P3"/>
      <text:p text:style-name="P10">Développement d’applications</text:p>
      <text:p text:style-name="P11">Rapport</text:p>
      <text:p text:style-name="P10">-</text:p>
      <text:p text:style-name="P10">Plateformer</text:p>
      <text:p text:style-name="P47">Astronaut Rescuer</text:p>
      <text:p text:style-name="P10"/>
      <text:p text:style-name="P10"/>
      <text:p text:style-name="P7">Au Mont-Houy, UPHF</text:p>
      <text:p text:style-name="P7">Année Universitaire 2025-2026</text:p>
      <text:p text:style-name="P7">Robert Tomczak</text:p>
      <text:p text:style-name="P2"/>
      <text:p text:style-name="P2"/>
      <text:p text:style-name="P2"><text:soft-page-break/></text:p>
      <text:p text:style-name="P2"/>
      <text:p text:style-name="P2"/>
      <text:p text:style-name="P2"/>
      <text:p text:style-name="P29"/>
      <text:table-of-content text:style-name="Sect1" text:name="Table des matières1">
        <text:table-of-content-source text:outline-level="7">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0"/>
            <text:p text:style-name="P41">Sommaire</text:p>
          </text:index-title>
          <text:p text:style-name="P38"><text:a xlink:type="simple" xlink:href="#__RefHeading___Toc1991_120380737" text:style-name="Index_20_Link" text:visited-style-name="Index_20_Link"><text:span text:style-name="T47">I – Backlog :<text:tab/>3</text:span></text:a></text:p>
          <text:p text:style-name="P39"><text:a xlink:type="simple" xlink:href="#__RefHeading___Toc2422_120380737" text:style-name="Index_20_Link" text:visited-style-name="Index_20_Link"><text:span text:style-name="T47"><text:s/>a.Backlog<text:tab/>3</text:span></text:a></text:p>
          <text:p text:style-name="P39"><text:a xlink:type="simple" xlink:href="#__RefHeading___Toc2611_120380737" text:style-name="Index_20_Link" text:visited-style-name="Index_20_Link"><text:span text:style-name="T48"><text:s/>b.MVP</text:span></text:a><text:a xlink:type="simple" xlink:href="#__RefHeading___Toc2611_120380737" text:style-name="Index_20_Link" text:visited-style-name="Index_20_Link"><text:span text:style-name="T47"><text:tab/>4</text:span></text:a></text:p>
          <text:p text:style-name="P38"><text:a xlink:type="simple" xlink:href="#__RefHeading___Toc2426_120380737" text:style-name="Index_20_Link" text:visited-style-name="Index_20_Link"><text:span text:style-name="T47">II – Le jeu :<text:tab/>5</text:span></text:a></text:p>
          <text:p text:style-name="P39"><text:a xlink:type="simple" xlink:href="#__RefHeading___Toc2428_120380737" text:style-name="Index_20_Link" text:visited-style-name="Index_20_Link"><text:span text:style-name="T47"><text:s/>a. Présentation<text:tab/>5</text:span></text:a></text:p>
          <text:p text:style-name="P39"><text:a xlink:type="simple" xlink:href="#__RefHeading___Toc2432_120380737" text:style-name="Index_20_Link" text:visited-style-name="Index_20_Link"><text:span text:style-name="T47"><text:s/>c. développement<text:tab/>7</text:span></text:a></text:p>
          <text:p text:style-name="P38"><text:a xlink:type="simple" xlink:href="#__RefHeading___Toc2434_120380737" text:style-name="Index_20_Link" text:visited-style-name="Index_20_Link"><text:span text:style-name="T47">III-Rapport des sprints<text:tab/>8</text:span></text:a></text:p>
          <text:p text:style-name="P39"><text:a xlink:type="simple" xlink:href="#__RefHeading___Toc2436_120380737" text:style-name="Index_20_Link" text:visited-style-name="Index_20_Link"><text:span text:style-name="T47"><text:s/>1.Rapport 1</text:span></text:a><text:a xlink:type="simple" xlink:href="#__RefHeading___Toc2436_120380737" text:style-name="Index_20_Link" text:visited-style-name="Index_20_Link"><text:span text:style-name="T42">er</text:span></text:a><text:a xlink:type="simple" xlink:href="#__RefHeading___Toc2436_120380737" text:style-name="Index_20_Link" text:visited-style-name="Index_20_Link"><text:span text:style-name="T47"> sprint :<text:tab/>8</text:span></text:a></text:p>
          <text:p text:style-name="P39"><text:a xlink:type="simple" xlink:href="#__RefHeading___Toc2438_120380737" text:style-name="Index_20_Link" text:visited-style-name="Index_20_Link"><text:span text:style-name="T47"><text:s/>2.Rapport 2</text:span></text:a><text:a xlink:type="simple" xlink:href="#__RefHeading___Toc2438_120380737" text:style-name="Index_20_Link" text:visited-style-name="Index_20_Link"><text:span text:style-name="T42">e </text:span></text:a><text:a xlink:type="simple" xlink:href="#__RefHeading___Toc2438_120380737" text:style-name="Index_20_Link" text:visited-style-name="Index_20_Link"><text:span text:style-name="T47">sprint :<text:tab/>8</text:span></text:a></text:p>
          <text:p text:style-name="P39"><text:a xlink:type="simple" xlink:href="#__RefHeading___Toc2613_120380737" text:style-name="Index_20_Link" text:visited-style-name="Index_20_Link"><text:span text:style-name="T47"><text:s/>3.Rapport 3</text:span></text:a><text:a xlink:type="simple" xlink:href="#__RefHeading___Toc2613_120380737" text:style-name="Index_20_Link" text:visited-style-name="Index_20_Link"><text:span text:style-name="T42">e </text:span></text:a><text:a xlink:type="simple" xlink:href="#__RefHeading___Toc2613_120380737" text:style-name="Index_20_Link" text:visited-style-name="Index_20_Link"><text:span text:style-name="T47">sprint :<text:tab/>8</text:span></text:a></text:p>
          <text:p text:style-name="P39"><text:a xlink:type="simple" xlink:href="#__RefHeading___Toc2615_120380737" text:style-name="Index_20_Link" text:visited-style-name="Index_20_Link"><text:span text:style-name="T47"><text:s/>4.Rapport 4</text:span></text:a><text:a xlink:type="simple" xlink:href="#__RefHeading___Toc2615_120380737" text:style-name="Index_20_Link" text:visited-style-name="Index_20_Link"><text:span text:style-name="T42">e </text:span></text:a><text:a xlink:type="simple" xlink:href="#__RefHeading___Toc2615_120380737" text:style-name="Index_20_Link" text:visited-style-name="Index_20_Link"><text:span text:style-name="T47">sprint :<text:tab/>9</text:span></text:a></text:p>
          <text:p text:style-name="P39"><text:a xlink:type="simple" xlink:href="#__RefHeading___Toc2617_120380737" text:style-name="Index_20_Link" text:visited-style-name="Index_20_Link"><text:span text:style-name="T47"><text:s/>5.Rapport 5</text:span></text:a><text:a xlink:type="simple" xlink:href="#__RefHeading___Toc2617_120380737" text:style-name="Index_20_Link" text:visited-style-name="Index_20_Link"><text:span text:style-name="T42">e </text:span></text:a><text:a xlink:type="simple" xlink:href="#__RefHeading___Toc2617_120380737" text:style-name="Index_20_Link" text:visited-style-name="Index_20_Link"><text:span text:style-name="T47">sprint :<text:tab/>9</text:span></text:a></text:p>
          <text:p text:style-name="P38"><text:a xlink:type="simple" xlink:href="#__RefHeading___Toc2440_120380737" text:style-name="Index_20_Link" text:visited-style-name="Index_20_Link"><text:span text:style-name="T47">IV- Rapport des membres<text:tab/>9</text:span></text:a></text:p>
          <text:p text:style-name="P39"><text:a xlink:type="simple" xlink:href="#__RefHeading___Toc2442_120380737" text:style-name="Index_20_Link" text:visited-style-name="Index_20_Link"><text:span text:style-name="T47"><text:s/>a.Milan Poulias<text:tab/>9</text:span></text:a></text:p>
          <text:p text:style-name="P39"><text:a xlink:type="simple" xlink:href="#__RefHeading___Toc2444_120380737" text:style-name="Index_20_Link" text:visited-style-name="Index_20_Link"><text:span text:style-name="T47"><text:s/>b. Thibault Lobry<text:tab/>11</text:span></text:a></text:p>
          <text:p text:style-name="P39"><text:a xlink:type="simple" xlink:href="#__RefHeading___Toc2446_120380737" text:style-name="Index_20_Link" text:visited-style-name="Index_20_Link"><text:span text:style-name="T47"><text:s/>c. Corentin Fareneau<text:tab/>12</text:span></text:a></text:p>
          <text:p text:style-name="P38"><text:a xlink:type="simple" xlink:href="#__RefHeading___Toc2448_120380737" text:style-name="Index_20_Link" text:visited-style-name="Index_20_Link"><text:span text:style-name="T47">V- Documents Supplémentaires<text:tab/>14</text:span></text:a></text:p>
          <text:p text:style-name="P39"><text:a xlink:type="simple" xlink:href="#__RefHeading___Toc2450_120380737" text:style-name="Index_20_Link" text:visited-style-name="Index_20_Link"><text:span text:style-name="T47"><text:s/>a.diagrammes<text:tab/>14</text:span></text:a></text:p>
          <text:p text:style-name="P39"><text:a xlink:type="simple" xlink:href="#__RefHeading___Toc2452_120380737" text:style-name="Index_20_Link" text:visited-style-name="Index_20_Link"><text:span text:style-name="T47"><text:s/></text:span></text:a><text:a xlink:type="simple" xlink:href="#__RefHeading___Toc2452_120380737" text:style-name="Index_20_Link" text:visited-style-name="Index_20_Link"><text:span text:style-name="T48">b.GitHub</text:span></text:a><text:a xlink:type="simple" xlink:href="#__RefHeading___Toc2452_120380737" text:style-name="Index_20_Link" text:visited-style-name="Index_20_Link"><text:span text:style-name="T47"><text:tab/>17</text:span></text:a></text:p>
        </text:index-body>
      </text:table-of-content>
      <text:p text:style-name="P2"/>
      <text:p text:style-name="P2"/>
      <text:p text:style-name="P2"/>
      <text:p text:style-name="P2"/>
      <text:p text:style-name="P12"><text:soft-page-break/>Dans le cadre du projet de soutenance du module : Développement d’applications, nous allons créer un jeu.</text:p>
      <text:p text:style-name="P12">Le projet a été mené selon une approche Agile de type SCRUM, avec un périmètre ajusté au fil des itérations. </text:p>
      <text:p text:style-name="P12"/>
      <text:p text:style-name="P14">Objectifs et finalités du projets : avoir un niveau fonctionnel avec les élément de gameplay spécifique.</text:p>
      <text:h text:style-name="Heading_20_1" text:outline-level="1"><text:bookmark-start text:name="__RefHeading___Toc1991_120380737"/><text:span text:style-name="T35">I</text:span><text:span text:style-name="T34"> – Backlog :</text:span> <text:bookmark-end text:name="__RefHeading___Toc1991_120380737"/></text:h>
      <text:h text:style-name="Heading_20_2" text:outline-level="2"><text:bookmark-start text:name="__RefHeading___Toc2422_120380737"/><text:tab/><text:span text:style-name="T26">a</text:span><text:span text:style-name="T4">.Backlog</text:span><text:bookmark-end text:name="__RefHeading___Toc2422_120380737"/></text:h>
      <text:p text:style-name="P57"/>
      <text:p text:style-name="P2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6">Fonctionnalité</text:p>
          </table:table-cell>
          <table:table-cell table:style-name="Tableau1.A1" office:value-type="string">
            <text:p text:style-name="P36">User story</text:p>
          </table:table-cell>
          <table:table-cell table:style-name="Tableau1.A1" office:value-type="string">
            <text:p text:style-name="P36">Critère d’acceptation</text:p>
          </table:table-cell>
        </table:table-row>
        <table:table-row table:style-name="Tableau1.1">
          <table:table-cell table:style-name="Tableau1.A1" office:value-type="string">
            <text:p text:style-name="P36">Se déplacer</text:p>
          </table:table-cell>
          <table:table-cell table:style-name="Tableau1.A1" office:value-type="string">
            <text:p text:style-name="P36">En tant que joueur, je veux me déplacer afin de parcourir le niveau</text:p>
          </table:table-cell>
          <table:table-cell table:style-name="Tableau1.A1" office:value-type="string">
            <text:p text:style-name="P36">Déplacement en rapport avec la touche pressée</text:p>
            <text:p text:style-name="P36">S’arrêter quand on rencontre un obstacle</text:p>
            <text:p text:style-name="P36">Tomber quand il y a un trou (gravité)</text:p>
          </table:table-cell>
        </table:table-row>
        <table:table-row table:style-name="Tableau1.1">
          <table:table-cell table:style-name="Tableau1.A1" office:value-type="string">
            <text:p text:style-name="P37">Quitter le jeu</text:p>
          </table:table-cell>
          <table:table-cell table:style-name="Tableau1.A1" office:value-type="string">
            <text:p text:style-name="P36">En tant que joueur, je veux accéder à un menu afin de quitter le jeu</text:p>
          </table:table-cell>
          <table:table-cell table:style-name="Tableau1.A1" office:value-type="string">
            <text:p text:style-name="P36">Touche pour ouvrir un menu</text:p>
            <text:p text:style-name="P36">Bouton pour quitter le jeu</text:p>
          </table:table-cell>
        </table:table-row>
        <table:table-row table:style-name="Tableau1.1">
          <table:table-cell table:style-name="Tableau1.A1" office:value-type="string">
            <text:p text:style-name="P36">Gagner/Perdre</text:p>
          </table:table-cell>
          <table:table-cell table:style-name="Tableau1.A1" office:value-type="string">
            <text:p text:style-name="P36">En tant que joueur, je veux savoir quand je <text:s/>perds/gagne afin de m’adapter/progresser</text:p>
          </table:table-cell>
          <table:table-cell table:style-name="Tableau1.A1" office:value-type="string">
            <text:p text:style-name="P36">Message « Game over »/ « Gagné »</text:p>
            <text:p text:style-name="P36">Recommencer au début du niveau</text:p>
            <text:p text:style-name="P36">Pouvoir finir le niveau (niveau possible)</text:p>
          </table:table-cell>
        </table:table-row>
        <table:table-row table:style-name="Tableau1.1">
          <table:table-cell table:style-name="Tableau1.A1" office:value-type="string">
            <text:p text:style-name="P35">Différencier le personnage et les décors</text:p>
          </table:table-cell>
          <table:table-cell table:style-name="Tableau1.A1" office:value-type="string">
            <text:p text:style-name="P36">En tant que joueur, je veux <text:span text:style-name="T37">reconnaître</text:span> mon personnage afin de faciliter mon expérience</text:p>
          </table:table-cell>
          <table:table-cell table:style-name="Tableau1.A1" office:value-type="string">
            <text:p text:style-name="P36">Formes différentes</text:p>
            <text:p text:style-name="P36">Couleurs différentes</text:p>
          </table:table-cell>
        </table:table-row>
        <table:table-row table:style-name="Tableau1.1">
          <table:table-cell table:style-name="Tableau1.A1" office:value-type="string">
            <text:p text:style-name="P36">Lire mon temps dans un niveau</text:p>
          </table:table-cell>
          <table:table-cell table:style-name="Tableau1.A1" office:value-type="string">
            <text:p text:style-name="P36">En tant que joueur, je veux <text:span text:style-name="T37">connaître</text:span> le temps de complétion du niveau afin de <text:span text:style-name="T37">connaître</text:span> ma performance</text:p>
          </table:table-cell>
          <table:table-cell table:style-name="Tableau1.A1" office:value-type="string">
            <text:p text:style-name="P36">Message à la fin du niveau avec mon temps</text:p>
            <text:p text:style-name="P36"/>
          </table:table-cell>
        </table:table-row>
        <table:table-row table:style-name="Tableau1.1">
          <table:table-cell table:style-name="Tableau1.A1" office:value-type="string">
            <text:p text:style-name="P36">Se battre contre des ennemis</text:p>
          </table:table-cell>
          <table:table-cell table:style-name="Tableau1.A1" office:value-type="string">
            <text:p text:style-name="P36">En tant que joueur, je veux rencontrer des adversaires afin d’augmenter la difficulté</text:p>
          </table:table-cell>
          <table:table-cell table:style-name="Tableau1.A1" office:value-type="string">
            <text:p text:style-name="P36">Objet pour détruire des ennemis</text:p>
            <text:p text:style-name="P36">Rencontre d’ennemis aléatoire</text:p>
          </table:table-cell>
        </table:table-row>
        <text:soft-page-break/>
        <table:table-row table:style-name="Tableau1.1">
          <table:table-cell table:style-name="Tableau1.A1" office:value-type="string">
            <text:p text:style-name="P36">Ramasser des objets</text:p>
          </table:table-cell>
          <table:table-cell table:style-name="Tableau1.A1" office:value-type="string">
            <text:p text:style-name="P36">En tant que joueur, je veux ramasser des objets afin d’obtenir des bonus</text:p>
          </table:table-cell>
          <table:table-cell table:style-name="Tableau1.A1" office:value-type="string">
            <text:p text:style-name="P36">Bouton/Touche pour ramasser objet</text:p>
          </table:table-cell>
        </table:table-row>
        <table:table-row table:style-name="Tableau1.1">
          <table:table-cell table:style-name="Tableau1.A1" office:value-type="string">
            <text:p text:style-name="P36">Lire la vie restante</text:p>
          </table:table-cell>
          <table:table-cell table:style-name="Tableau1.A1" office:value-type="string">
            <text:p text:style-name="P36">En tant que joueur, je veux <text:span text:style-name="T37">connaître</text:span> ma vie afin d’adapter mon style de jeu</text:p>
          </table:table-cell>
          <table:table-cell table:style-name="Tableau1.A1" office:value-type="string">
            <text:p text:style-name="P36">Boite avec une barre de vie</text:p>
            <text:p text:style-name="P36">Perdre de la vie quand un ennemi nous touche</text:p>
          </table:table-cell>
        </table:table-row>
        <table:table-row table:style-name="Tableau1.1">
          <table:table-cell table:style-name="Tableau1.A1" office:value-type="string">
            <text:p text:style-name="P36">S’immerger dans le monde</text:p>
          </table:table-cell>
          <table:table-cell table:style-name="Tableau1.A1" office:value-type="string">
            <text:p text:style-name="P36">En tant que joueur, je veux m’immerger dans le monde afin de profiter de l’expérience</text:p>
          </table:table-cell>
          <table:table-cell table:style-name="Tableau1.A1" office:value-type="string">
            <text:p text:style-name="P36">Histoire intéressante</text:p>
            <text:p text:style-name="P36">Décors, ennemis, personnages, sons cohérents</text:p>
            <text:p text:style-name="P36"/>
          </table:table-cell>
        </table:table-row>
        <table:table-row table:style-name="Tableau1.1">
          <table:table-cell table:style-name="Tableau1.A1" office:value-type="string">
            <text:p text:style-name="P36">Choisir son skin</text:p>
          </table:table-cell>
          <table:table-cell table:style-name="Tableau1.A1" office:value-type="string">
            <text:p text:style-name="P36">En tant que joueur, je veux personnaliser mon avatar afin d’adapter mon personnage à mes désirs</text:p>
          </table:table-cell>
          <table:table-cell table:style-name="Tableau1.A1" office:value-type="string">
            <text:p text:style-name="P36">Menu pour choisir son avatar</text:p>
            <text:p text:style-name="P36">Débloquer des skins en finissant des niveaux</text:p>
          </table:table-cell>
        </table:table-row>
        <table:table-row table:style-name="Tableau1.1">
          <table:table-cell table:style-name="Tableau1.A1" office:value-type="string">
            <text:p text:style-name="P36">Avoir une monnaie de jeu</text:p>
          </table:table-cell>
          <table:table-cell table:style-name="Tableau1.A1" office:value-type="string">
            <text:p text:style-name="P36">En tant que joueur, je veux gagner une monnaie de jeu afin d’acheter des bonus</text:p>
          </table:table-cell>
          <table:table-cell table:style-name="Tableau1.A1" office:value-type="string">
            <text:p text:style-name="P36">Menu « portemonnaie »</text:p>
            <text:p text:style-name="P36">Compteur qui évolue avec le nombre de devise ramassée</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0"/>
      <text:p text:style-name="P60"/>
      <text:p text:style-name="P60"/>
      <text:p text:style-name="P60"/>
      <text:p text:style-name="P60"/>
      <text:p text:style-name="P60"/>
      <text:p text:style-name="P60"/>
      <text:h text:style-name="P51" text:outline-level="2"><text:bookmark-start text:name="__RefHeading___Toc2611_120380737"/><text:soft-page-break/><text:span text:style-name="T25"><text:tab/></text:span><text:span text:style-name="T23">b.</text:span><text:span text:style-name="T22">MVP</text:span> <text:bookmark-end text:name="__RefHeading___Toc2611_120380737"/></text:h>
      <text:p text:style-name="P9"/>
      <text:p text:style-name="P9"/>
      <text:p text:style-name="P12"/>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6">Fonctionnalité</text:p>
          </table:table-cell>
          <table:table-cell table:style-name="Tableau2.A1" office:value-type="string">
            <text:p text:style-name="P36">User Story</text:p>
          </table:table-cell>
          <table:table-cell table:style-name="Tableau2.A1" office:value-type="string">
            <text:p text:style-name="P36">Critères d’acceptation</text:p>
          </table:table-cell>
        </table:table-row>
        <table:table-row table:style-name="Tableau2.1">
          <table:table-cell table:style-name="Tableau2.A1" office:value-type="string">
            <text:p text:style-name="P36">Se déplacer</text:p>
          </table:table-cell>
          <table:table-cell table:style-name="Tableau2.A1" office:value-type="string">
            <text:p text:style-name="P36">En tant que joueur, je veux me déplacer afin de parcourir le niveau</text:p>
          </table:table-cell>
          <table:table-cell table:style-name="Tableau2.A1" office:value-type="string">
            <text:p text:style-name="P36">Déplacement en rapport avec la touche pressée</text:p>
            <text:p text:style-name="P36">S’arrêter quand on rencontre un obstacle</text:p>
            <text:p text:style-name="P36">Tomber quand il y a un trou (gravité)</text:p>
          </table:table-cell>
        </table:table-row>
        <table:table-row table:style-name="Tableau2.1">
          <table:table-cell table:style-name="Tableau2.A1" office:value-type="string">
            <text:p text:style-name="P36">Quitter le jeu</text:p>
          </table:table-cell>
          <table:table-cell table:style-name="Tableau2.A1" office:value-type="string">
            <text:p text:style-name="P36">En tant que joueur, je veux accéder à un menu afin de quitter le jeu</text:p>
          </table:table-cell>
          <table:table-cell table:style-name="Tableau2.A1" office:value-type="string">
            <text:p text:style-name="P36">Touche pour ouvrir un menu</text:p>
            <text:p text:style-name="P36">Bouton pour quitter le jeu</text:p>
          </table:table-cell>
        </table:table-row>
        <table:table-row table:style-name="Tableau2.1">
          <table:table-cell table:style-name="Tableau2.A1" office:value-type="string">
            <text:p text:style-name="P36">Gagner/Perdre</text:p>
          </table:table-cell>
          <table:table-cell table:style-name="Tableau2.A1" office:value-type="string">
            <text:p text:style-name="P36">En tant que joueur, je veux savoir quand je <text:s/>perds/gagne afin de m’adapter/progresser</text:p>
          </table:table-cell>
          <table:table-cell table:style-name="Tableau2.A1" office:value-type="string">
            <text:p text:style-name="P36">Message « Game over »/ « Gagné »</text:p>
            <text:p text:style-name="P36">Recommencer au début du niveau</text:p>
            <text:p text:style-name="P36">Pouvoir finir le niveau (niveau possible)</text:p>
          </table:table-cell>
        </table:table-row>
        <table:table-row table:style-name="Tableau2.1">
          <table:table-cell table:style-name="Tableau2.A1" office:value-type="string">
            <text:p text:style-name="P36">Différencier le personnage et les décors</text:p>
          </table:table-cell>
          <table:table-cell table:style-name="Tableau2.A1" office:value-type="string">
            <text:p text:style-name="P36">En tant que joueur, je veux reconnaitre mon personnage afin de faciliter mon expérience</text:p>
          </table:table-cell>
          <table:table-cell table:style-name="Tableau2.A1" office:value-type="string">
            <text:p text:style-name="P36">Formes différentes</text:p>
            <text:p text:style-name="P36">Couleurs différentes</text:p>
          </table:table-cell>
        </table:table-row>
        <table:table-row table:style-name="Tableau2.1">
          <table:table-cell table:style-name="Tableau2.A1" office:value-type="string">
            <text:p text:style-name="P36">Lire la vie restante</text:p>
          </table:table-cell>
          <table:table-cell table:style-name="Tableau2.A1" office:value-type="string">
            <text:p text:style-name="P36">En tant que joueur, je veux connaitre ma vie afin d’adapter mon style de jeu</text:p>
          </table:table-cell>
          <table:table-cell table:style-name="Tableau2.A1" office:value-type="string">
            <text:p text:style-name="P36">Boite avec une barre de vie</text:p>
            <text:p text:style-name="P36">Perdre de la vie quand un ennemi nous touche</text:p>
          </table:table-cell>
        </table:table-row>
      </table:table>
      <text:p text:style-name="P4"/>
      <text:p text:style-name="P66"/>
      <text:p text:style-name="P66"/>
      <text:p text:style-name="P66"/>
      <text:p text:style-name="P66"/>
      <text:p text:style-name="P66"/>
      <text:p text:style-name="P66"/>
      <text:p text:style-name="P66"/>
      <text:h text:style-name="P48" text:outline-level="1"><text:bookmark-start text:name="__RefHeading___Toc2426_120380737"/><text:soft-page-break/><text:span text:style-name="T36">II – Le jeu :</text:span> <text:bookmark-end text:name="__RefHeading___Toc2426_120380737"/></text:h>
      <text:h text:style-name="Heading_20_2" text:outline-level="2"><text:bookmark-start text:name="__RefHeading___Toc2428_120380737"/><text:span text:style-name="T50"><text:tab/></text:span><text:span text:style-name="T12">a. Présentation</text:span><text:bookmark-end text:name="__RefHeading___Toc2428_120380737"/></text:h>
      <text:p text:style-name="P58"/>
      <text:p text:style-name="P26"><text:span text:style-name="T49">Le titre de ce jeu est </text:span>Astronaut Rescuer : </text:p>
      <text:p text:style-name="P8"/>
      <text:p text:style-name="P13">C’est un jeu de type plateforme <text:span text:style-name="T38">RPG </text:span>de type « die and retry » à écran unique développé sur pygame, et jouable sur PC.</text:p>
      <text:p text:style-name="P13"/>
      <text:p text:style-name="P13"><text:tab/>Dans un futur proche, l’Humain a réussi à maîtriser le voyage spatial et s’en sert pour récolter tout types de ressources sur les planètes qu’il a découvert. Malheureusement, il arrive que ces récolteurs de ressources (aussi humains) ne puisse plus s’extraire de la planète car ils se sont blessés, se sont évanouis ou sont tout simplement bloqués.</text:p>
      <text:p text:style-name="P13">C’est là qu’entre en scène les Astronauts Rescuers, ce sont des astronautes spécialement entraînés à chaque planète et leur gravité afin d’en secourir les récolteurs. Ils maîtrisent à la perfection les particularités de leur planète respective afin de rapatrier en toute sécurité les victimes.</text:p>
      <text:p text:style-name="P13">Mais depuis un certain temps, les interventions de secours se sont multipliés de manière anormale et les astronautes secourus n’ont plus aucun souvenir de ce qui leur est arrivé… </text:p>
      <text:p text:style-name="P13">Quelque chose se cache dans l’ombre de nos secouristes et ils auront alors besoin d’enquêter sur les raisons de cette anomalie.</text:p>
      <text:p text:style-name="P13">Le joueur sera alors plongé dans le corps de nos secouristes, dans des niveaux et des mondes correspondants à différentes planètes et devront alors s’adapter à la gravité pour atteindre les astronautes inconscients et les ramener à la navette qui les a transportés .</text:p>
      <text:p text:style-name="P15">(Possibilité d’ajouter des niveaux à énigme pour étendre le lore) </text:p>
      <text:p text:style-name="P16"/>
      <text:p text:style-name="P16">L’objectif du joueur est de compléter le niveau 2 fois mais dans des sens opposés. En atteignant le fin du niveau celui-ci obtient un checkpoint modélisé par le corps de l’astronaute récolteur et devra alors retourner sur ses pas afin de compléter le niveau.</text:p>
      <text:p text:style-name="P16">Le niveau se finit lorsque le joueur atteint sa fusée en ayant atteint le checkpoint.</text:p>
      <text:p text:style-name="P16"/>
      <text:p text:style-name="P42"><text:tab/><text:span text:style-name="T6">b. Gameplay</text:span></text:p>
      <text:p text:style-name="P61"/>
      <text:p text:style-name="P16">Le joueur dispose de différentes commandes de base pour faire déplacer le personnage : </text:p>
      <text:p text:style-name="P16"/>
      <text:p text:style-name="P16">- les touches « q » et « &lt; » pour se déplacer vers la gauche,</text:p>
      <text:p text:style-name="P16">- les touches « d » et « &gt; » pour se déplacer vers la droite,</text:p>
      <text:p text:style-name="P16">- la barre espace pour sauter,</text:p>
      <text:p text:style-name="P16"><text:soft-page-break/></text:p>
      <text:p text:style-name="P16">On a produit un design de personnage, de plateforme et d’arrière-plan harmonieux pour correspondre à l’univers.</text:p>
      <text:p text:style-name="P16"/>
      <text:p text:style-name="P16">L’élément de gameplay central est le changement de gravité en fonction du niveau proposé, avec une cohérence avec le monde réel. Par exemple, la gravité sur la Lune sera moins élevé que celle sur Vénus. Aussi la particularité du jeu est le fait que les niveaux soient créés avec un double sens, c’est à dire qu’il est possible de revenir sur ses pas. (à l’avenir sur de prochains niveaux, le joueur devra être attentif à ses déplacements pour ne pas empêcher son retour, blocs à déplacés, sorties bouchées, trous à sécurisés, etc.) </text:p>
      <text:p text:style-name="P16"/>
      <text:p text:style-name="P16">Le système de récompenses et progressions n’est pas encore établi, possibilité d’ajouter une monnaie de jeu, des skins achetables, éléments à récupérer obligatoire pour continuer le jeu, etc.</text:p>
      <text:p text:style-name="P16"/>
      <text:p text:style-name="P16">Narration et univers au dessus </text:p>
      <text:p text:style-name="P16"/>
      <text:p text:style-name="P16">Personnages : </text:p>
      <text:p text:style-name="P16"><text:tab/>Prota : Astronauts rescuers</text:p>
      <text:p text:style-name="P16"><text:tab/>Anta : Vamiante (race extraterrestre qui s’adapte à chaque gravité), roi Vamiante→ veut empêcher les humains de récupérer les ressources et les envahir </text:p>
      <text:p text:style-name="P16"/>
      <text:p text:style-name="P16">Monde : </text:p>
      <text:p text:style-name="P16">Planètes dans l’ordre : Lune, Vénus, Mars, Pluton, Saturne, Uranus (pas de surface solide mais les humains ont une technologie pour marcher dessus) , Vamiantar (seule fictive, gravité changeante en fonction du niveau) </text:p>
      <text:p text:style-name="P16"/>
      <text:p text:style-name="P17">Direction artistique : </text:p>
      <text:p text:style-name="P17">Jeu de plateforme R<text:span text:style-name="T39">PG pixelisé inspiré de Super Mario Bros.</text:span></text:p>
      <text:p text:style-name="P18">Le personnage principal est un astronaute avec une tenue classique blanche comme on connaît et une visière dorée.</text:p>
      <text:p text:style-name="P18"/>
      <text:p text:style-name="P19">Sound effect : </text:p>
      <text:p text:style-name="P19">- musique de fond comme si il y avait un grand vide, un peu mystérieux, <text:span text:style-name="T40">orchestral </text:span></text:p>
      <text:p text:style-name="P19">- effet de respiration de l’astronaute par dessus la musique (léger)</text:p>
      <text:p text:style-name="P19">- son de saut et atterrissage, par exemple : « Hop ! » lors du saut, souffle plus fort au moment d’atterrir</text:p>
      <text:p text:style-name="P19">- <text:s/>son des pas sur la musique.</text:p>
      <text:p text:style-name="P18"/>
      <text:p text:style-name="P18">Moteur du jeu : PyGame.</text:p>
      <text:p text:style-name="P18">Configurations requises : Pygame, Python, un compilateur.</text:p>
      <text:p text:style-name="P62"/>
      <text:h text:style-name="Heading_20_2" text:outline-level="2"><text:bookmark-start text:name="__RefHeading___Toc2432_120380737"/><text:soft-page-break/><text:span text:style-name="T15"><text:tab/></text:span><text:span text:style-name="T6">c. développement</text:span><text:bookmark-end text:name="__RefHeading___Toc2432_120380737"/></text:h>
      <text:p text:style-name="P67"/>
      <text:p text:style-name="P20">Structure de l’équipe : </text:p>
      <text:p text:style-name="P20"/>
      <text:p text:style-name="P20">Milan : développeur principale</text:p>
      <text:p text:style-name="P20">Thibault : pixel artiste , développeur </text:p>
      <text:p text:style-name="P20">Corentin : game designer, rapporteur, développeur </text:p>
      <text:p text:style-name="P16"/>
      <text:p text:style-name="P20">Développement en sprint : </text:p>
      <text:p text:style-name="P20"/>
      <text:p text:style-name="P20">1<text:span text:style-name="T41">er</text:span> sprint : Déplacement personnage <text:span text:style-name="T43">(Milan) </text:span>+ design personnage <text:span text:style-name="T43">(Thibault)</text:span> - <text:span text:style-name="T44">4 heures</text:span></text:p>
      <text:p text:style-name="P20">2<text:span text:style-name="T41">e</text:span> sprint : intégration design et gravité <text:span text:style-name="T43">(Milan, Corentin)</text:span> + design background <text:span text:style-name="T43">(Thibault)</text:span>– <text:span text:style-name="T44">6 heures</text:span></text:p>
      <text:p text:style-name="P20">3<text:span text:style-name="T41">e</text:span> sprint : mécanique c<text:span text:style-name="T45">ollisions + </text:span><text:span text:style-name="T46">ajout plateformes </text:span><text:span text:style-name="T43">(all)</text:span>– <text:span text:style-name="T44">3 heures </text:span></text:p>
      <text:p text:style-name="P21">4<text:span text:style-name="T41">e</text:span> sprint : intégration design background et personnage au centre <text:span text:style-name="T43">(all)</text:span>- <text:span text:style-name="T44">6 heures </text:span></text:p>
      <text:p text:style-name="P22">5<text:span text:style-name="T41">e</text:span> sprint : intégration fonctionnalités quitter le jeu, perdre/gagner, système de vie , <text:span text:style-name="T46">checkpoint</text:span>(all) <text:tab/></text:p>
      <text:p text:style-name="P16"><text:tab/></text:p>
      <text:p text:style-name="P23"/>
      <text:h text:style-name="P50" text:outline-level="1"><text:bookmark-start text:name="__RefHeading___Toc2434_120380737"/>III-Rapport des sprints<text:bookmark-end text:name="__RefHeading___Toc2434_120380737"/></text:h>
      <text:h text:style-name="P52" text:outline-level="2"><text:bookmark-start text:name="__RefHeading___Toc2436_120380737"/><text:span text:style-name="T49"><text:tab/></text:span><text:span text:style-name="T3">1.</text:span><text:span text:style-name="T2">Rapport 1</text:span><text:span text:style-name="T20">er</text:span><text:span text:style-name="T2"> sprint : </text:span><text:bookmark-end text:name="__RefHeading___Toc2436_120380737"/></text:h>
      <text:p text:style-name="P24"/>
      <text:p text:style-name="P24">Design du personnage jouable fini. Tout les sprites neutre, en marche et en saut sont aussi retournés (droite et gauche)</text:p>
      <text:p text:style-name="P24">Déplacement : le personnage peut se déplacer grâce aux touches : « g » et « &lt; » pour aller à gauche, « d » et « &gt; » pour aller à droite, espace pour aller vers le haut. </text:p>
      <text:p text:style-name="P24">Problème : lorsqu’on appuie sur plusieurs touches en même temps, mais qu’on relâche en premier la deuxième touche sur laquelle on a appuyé, le personnage se bloque.</text:p>
      <text:h text:style-name="Heading_20_2" text:outline-level="2"><text:bookmark-start text:name="__RefHeading___Toc2438_120380737"/><text:tab/><text:span text:style-name="T7">2</text:span><text:span text:style-name="T6">.</text:span><text:span text:style-name="T8">Rapport </text:span><text:span text:style-name="T7">2</text:span><text:span text:style-name="T21">e </text:span><text:span text:style-name="T8">sprint : </text:span><text:bookmark-end text:name="__RefHeading___Toc2438_120380737"/></text:h>
      <text:p text:style-name="P75"/>
      <text:p text:style-name="P6">Intégration des personnages en fonction du mouvement. Problème : chaque design avait une taille différente, ce qui faisait changer la taille du personnage à chaque mouvement du joueur. Il a fallu redimensionner chaque image pour qu’elles correspondent.</text:p>
      <text:p text:style-name="P6"/>
      <text:p text:style-name="P6">Intégration de la gravité du joueur. Problème : essais de plusieurs fonctions pour avoir le résultat attendu, plusieurs tentatives.</text:p>
      <text:p text:style-name="P6"><text:soft-page-break/></text:p>
      <text:p text:style-name="P6">Design background libre d’utilisation, design du sol et des plateformes. Attention sur la taille des images.</text:p>
      <text:p text:style-name="P5"/>
      <text:h text:style-name="Heading_20_2" text:outline-level="2"><text:bookmark-start text:name="__RefHeading___Toc2613_120380737"/><text:tab/><text:span text:style-name="T9">3</text:span><text:span text:style-name="T6">.</text:span><text:span text:style-name="T8">Rapport </text:span><text:span text:style-name="T9">3</text:span><text:span text:style-name="T21">e </text:span><text:span text:style-name="T8">sprint :</text:span><text:bookmark-end text:name="__RefHeading___Toc2613_120380737"/></text:h>
      <text:p text:style-name="P77"/>
      <text:p text:style-name="P78">Intégration des collisions. Fonction de base inclus dans pygame. Problème : lorsqu’on s’arrêtait sur les plateformes, le personnages arrivait au centre de celle-ci et non sur le dessus . Solution : création d’une fonction des collisions avec les sprites.</text:p>
      <text:p text:style-name="P43"><text:span text:style-name="T55">I</text:span><text:span text:style-name="T54">ntégration des plateformes. </text:span><text:span text:style-name="T56">Premièrement avec la fonction Rect() et des coordonnées et une taille de rectangle. Problème : on ne pouvait pas intégrer l’image des plateformes . Solutions : utilisation de sprites pour intégrer l’images des plateformes.</text:span></text:p>
      <text:p text:style-name="P5"/>
      <text:h text:style-name="Heading_20_2" text:outline-level="2"><text:bookmark-start text:name="__RefHeading___Toc2615_120380737"/><text:span text:style-name="T16"><text:s text:c="8"/></text:span><text:span text:style-name="T10">4</text:span><text:span text:style-name="T6">.</text:span><text:span text:style-name="T8">Rapport </text:span><text:span text:style-name="T10">4</text:span><text:span text:style-name="T21">e </text:span><text:span text:style-name="T8">sprint :</text:span><text:bookmark-end text:name="__RefHeading___Toc2615_120380737"/></text:h>
      <text:p text:style-name="P5"/>
      <text:p text:style-name="P56">Intégration du background et des sols. Le personnage n’est pas centré mais est rediriger à droite de l’écran quand il arrive à gauche de l’écran et inversement.</text:p>
      <text:p text:style-name="P65"/>
      <text:h text:style-name="Heading_20_2" text:outline-level="2"><text:bookmark-start text:name="__RefHeading___Toc2617_120380737"/><text:span text:style-name="T13"><text:tab/></text:span><text:span text:style-name="T14"> </text:span><text:span text:style-name="T27">5</text:span><text:span text:style-name="T6">.</text:span><text:span text:style-name="T8">Rapport </text:span><text:span text:style-name="T10">5</text:span><text:span text:style-name="T21">e </text:span><text:span text:style-name="T8">sprint :</text:span><text:bookmark-end text:name="__RefHeading___Toc2617_120380737"/></text:h>
      <text:p text:style-name="P63"/>
      <text:p text:style-name="P30"><text:span text:style-name="T55">I</text:span><text:span text:style-name="T54">ntégration d’un menu pour rejoindre ou quitter le jeu. Problème : on ne peut pas l’ouvrir directement en jeu. On ne peut pas quitter directement dans le jeu. On peut quitter avec la “croix” de l’écran.</text:span></text:p>
      <text:h text:style-name="P50" text:outline-level="1"><text:bookmark-start text:name="__RefHeading___Toc2440_120380737"/>IV- Rapport des membres<text:bookmark-end text:name="__RefHeading___Toc2440_120380737"/></text:h>
      <text:h text:style-name="P53" text:outline-level="2"><text:bookmark-start text:name="__RefHeading___Toc2442_120380737"/><text:tab/><text:span text:style-name="T5">a.Milan Poulias</text:span><text:bookmark-end text:name="__RefHeading___Toc2442_120380737"/></text:h>
      <text:p text:style-name="P74">Au sein de l’équipe, j’ai principalement occupé le rôle de développeur principal. Mon travail consistait avant tout à mettre en place les différents modules nécessaires au bon fonctionnement du jeu, mais également à accompagner mes camarades lorsque cela était nécessaire, aussi bien pour l’installation de Pygame que pour certaines parties du développement.</text:p>
      <text:p text:style-name="P33">Mon travail s’est principalement concentré sur les déplacements et les comportements associés au joueur. En ce qui concerne le développement, je me suis occupé de la classe <text:span text:style-name="T57">Joueur</text:span>. Cette classe est très importante parce qu’elle gère les comportements de notre personnage à l’écran. Ainsi, il a fallut décider de quelles touches permettaient de se déplacer et de synchroniser les différents états du personnage. Je me suis aussi occupé d’assembler le code de mes camarades afin de créer la boucle de jeu principale. </text:p>
      <text:p text:style-name="P33">Pour la partie design, il m’a été confié la tâche de détourer plusieurs images afin qu’elles puissent être intégrées correctement au jeu. J’ai utilisé Paint.net afin de supprimer les arrière-plans et préparer les sprites utilisés pendant le développement.</text:p>
      <text:p text:style-name="P33">Enfin, pour les tests, je me suis d’abord assuré que les déplacements du joueur correspondent toujours à ce qui est attendu (pas de double saut par exemple). J’ai, ensuite, travaillé sur les images, m’assurant que celles-ci soient toujours en rapport avec le déplacement de notre personnage. Je me suis aussi chargé d’assembler les différentes parties développées par mes camarades afin de créer la boucle principale du jeu et obtenir une version jouable de <text:span text:style-name="T57">Astronaut Rescuer</text:span>. J’ai notamment intégré le menu principal développé par Thibaut ainsi que le système de plateformes réalisé par Corentin avec ma propre partie concernant le joueur.</text:p>
      <text:p text:style-name="P33">Pour le développement d’Astronaut Rescuer, il a été nécessaire d’utiliser le langage Python et le module Pygame.</text:p>
      <text:p text:style-name="P33">Lors des Scrums, je me suis impliqué à expliquer clairement ce que je faisais et où j’en étais. Je me suis aussi intéressé aux parties de mes camarades, essayant de les aider lorsque je pouvais. </text:p>
      <text:p text:style-name="P33"/>
      <text:p text:style-name="P33">Lors de la mise en place des déplacements, j’ai rencontré un bug avec la gestion de la répétition des touches. En effet, par défaut, lorsqu’on maintient une touche enfoncé, pygame ne compte qu’un seul appui, il faut donc appuyer plusieurs fois, ce qui n’est pas confortable pour le joueur. Pour pallier ce problème, j’ai commencé par utiliser la fonction <text:span text:style-name="T57">set_repeat()</text:span>, qui détecte une touche enfoncée et envoie périodiquement un appui. Malheureusement, cette fonction gère mal les appuis en simultanés, ce qui est nécessaire pour se déplacer tout en sautant notamment. En effet, lorsqu’on qu’on appui sur 2 touches ou plus, si on relâche la dernière touche enfoncée, pygame ne compte plus aucuns appuis venant des autres touches. Dans le cadre de notre jeu, cela se traduit par le fait que si on maintient enfoncé la touche pour se déplacer la vers la droite tout en maintenant enfoncé la touche pour se déplacer vers la gauche, et que l’on lâche la touche pour se déplacer vers la gauche, notre personnage s’arrête alors qu’il devrait se déplacer vers la droite. Alors, plutôt que d’utiliser la fonction <text:span text:style-name="T57">set_repeat</text:span>, j’ai utilisé la fonction <text:span text:style-name="T57">tick()</text:span> qui permet de définir le nombre de rafraichissement maximal par seconde pour notre fenêtre de jeu. Par exemple, en appelant <text:span text:style-name="T57">tick(60)</text:span>, on limite notre fenêtre de jeu à 60 images par seconde, et donc à 60 appels de notre fonction de déplacement. Et avant cette fonction, tout fonctionne comme attendu.</text:p>
      <text:p text:style-name="P31"><text:soft-page-break/><text:span text:style-name="T59">Le python est un langage que je connais assez bien, mes cours d’informatique l’année dernière étaient tous en python. Par contre, le module pygame était totalement nouveau pour moi. Alors, j’ai appris les bases en créant un morpion à l’aide de vidéos et de la documentation (</text:span><text:a xlink:type="simple" xlink:href="http://www.pygame.org/docs" text:style-name="Internet_20_link" text:visited-style-name="Visited_20_Internet_20_Link"><text:span text:style-name="Internet_20_link"><text:span text:style-name="T59">www.pygame.org/docs</text:span></text:span></text:a><text:span text:style-name="T59">). Cela m’a aidé pour le développement d’Astronaut Rescuer, en limitant le nombre de nouvelles méthode à apprendre.</text:span></text:p>
      <text:p text:style-name="P33">Rendre le projet a été assez difficile. Tout d’abord, notre travail étant très lié, si quelqu’un prenait un peu de retard, tout le groupe était pénalisé. Il y aussi la période pendant laquelle a été réalisé le projet. Notre groupe a préféré se concentrer sur les examens qui approchaient, avançant sur le projet lorsque que nous avions un peu de temps.</text:p>
      <text:p text:style-name="P33">Avec notre jeu, j’ai pu apprendre et consolider mes connaissances sur pygame. Ça a été l’occasion de mettre en place le versioning, notion qui me paraissait assez flou jusque-là. Ce projet a aussi été l’occasion de travailler en groupe, chose qui que je n’avais jamais pu faire. Grâce à ce projet, j’ai appris à être persévérant, notamment pour régler les différents bugs tout au long.</text:p>
      <text:p text:style-name="P33"/>
      <text:p text:style-name="P33">Je suis particulièrement fier de réussir à rendre notre jeu sans aucuns bugs. Je me suis particulièrement appliqué à corriger chaque bug lorsqu’il se présentait avant de passer à la suite. Je suis aussi assez fier d’avoir pu aider mes camarades dans la mesure du possible. Je préférais qu’on avance ensemble, plutôt que l’un d’entre nous prenne du retard. </text:p>
      <text:p text:style-name="P33">Même si le projet final reste fonctionnel et relativement abouti, nous n’avons pas pu implémenter toutes les fonctionnalités prévues dans notre MVP initial. Vouloir à tous prix corriger les bugs nous a couté du temps que nous aurions pu investir pour compléter notre projet.</text:p>
      <text:p text:style-name="P33">J’ai trouvé que la méthode Scrum se prêtait bien à notre projet. En effet, nous avons pu diviser chaque fonctionnalité en sprint pour mieux nous répartir le travail. Nous avons aussi pu, rapidement, arriver sur une version testable de notre jeu. </text:p>
      <text:p text:style-name="P73"><text:span text:style-name="T58">L’apprentissage de pygame me permettra de créer d’autres jeux avec ce module à l’avenir, maintenant que j’en connais la base. De plus, l’apprentissage du versioning est quelque que je réutiliserai pour chaque futur projet, maintenant que j’en comprends l’importance. Enfin, les méthodes acquises concernant les travaux de groupes, me seront très certainement utiles pour mes futurs projets.</text:span></text:p>
      <text:p text:style-name="P73"><text:span text:style-name="T58"/></text:p>
      <text:h text:style-name="P54" text:outline-level="2"><text:bookmark-start text:name="__RefHeading___Toc2444_120380737"/><text:span text:style-name="T51"><text:s text:c="7"/></text:span><text:span text:style-name="T32"><text:s/></text:span><text:span text:style-name="T33">b. T</text:span><text:span text:style-name="T30">hibault Lobry</text:span><text:bookmark-end text:name="__RefHeading___Toc2444_120380737"/></text:h>
      <text:p text:style-name="P59"/>
      <text:p text:style-name="P79">Pour ce projet, j’ai occupé plusieurs rôles complémentaires. J’ai tout d’abord participé à la partie artistique en réalisant les sprites des personnages ainsi que les plateformes du jeu afin de respecter une direction visuelle cohérente. J’ai également contribué au développement en programmant un menu principal fonctionnel. Enfin, je me suis chargé de la création et de l’organisation du dépôt GitHub du projet afin de faciliter le travail collaboratif entre les membres de l’équipe.</text:p>
      <text:p text:style-name="P79"><text:soft-page-break/>Dans un premier temps, je me suis concentré sur la création des éléments graphiques du jeu. Pour cela, j’ai utilisé le site Pixilart afin de réaliser les dessins en pixel art. Le thème principal du jeu étant l’espace, j’ai choisi de créer un personnage d’astronaute afin de correspondre à l’univers visuel du projet. J’ai conçu plusieurs sprites permettant d’animer le personnage dans différentes situations : des sprites pour l’état immobile, pour le déplacement ainsi que pour le saut, avec à chaque fois une version orientée vers la gauche et une autre vers la droite. Ce travail m’a demandé plusieurs ajustements techniques, notamment au niveau des dimensions des sprites. En effet, certains fichiers n’avaient pas exactement la même taille, ce qui pouvait compliquer leur intégration dans le jeu et gêner le développeur principal lors de l’animation du personnage. J’ai donc dû reprendre plusieurs fois les formats afin d’obtenir un rendu homogène et facilement exploitable dans le code.</text:p>
      <text:p text:style-name="P79">J’ai également réalisé les éléments du décor interactif, notamment le sol et les plateformes. J’ai choisi de créer un terrain inspiré de la surface lunaire afin de rester cohérent avec l’ambiance spatiale du jeu. Les plateformes en hauteur ont été conçues dans la même direction artistique afin de conserver une identité visuelle uniforme tout au long des niveaux. Concernant l’arrière-plan, j’ai utilisé une image trouvée sur Internet provenant de Getty Images afin d’apporter davantage d’immersion et de renforcer l’atmosphère spatiale dès les premières secondes de jeu.</text:p>
      <text:p text:style-name="P79">Par la suite, je me suis occupé du développement du menu principal. Mon objectif était de proposer une interface simple et intuitive permettant au joueur de choisir entre commencer une partie ou quitter le jeu. J’ai donc programmé différents boutons interactifs : le bouton « Commencer » devait lancer le jeu et afficher la fenêtre principale, tandis que le bouton « Quitter » devait fermer correctement l’application. J’ai également intégré l’arrière-plan spatial dans le menu afin de plonger immédiatement le joueur dans l’univers du jeu dès son lancement. Une fois le menu terminé, j’ai transmis mon code à Milan pour qu’il puisse l’intégrer au reste du projet.</text:p>
      <text:p text:style-name="P79">Cette partie du travail a nécessité plusieurs phases de test et de correction. J’ai notamment dû vérifier le bon fonctionnement des boutons interactifs afin d’éviter les erreurs de navigation ou les problèmes de fermeture du programme. J’ai aussi passé du temps à ajuster l’affichage graphique, en particulier le centrage de l’arrière-plan et des différents éléments du menu pour garantir un rendu propre et agréable visuellement.</text:p>
      <text:p text:style-name="P79"/>
      <text:p text:style-name="P79">Pour les scrum, j'ai pu montrer mes avancements dans les design des personnages pour avoir les avis de Milan et de Corentin puis l'avancement de mon menu pour voir si c'est fonctionnel.</text:p>
      <text:p text:style-name="P79"/>
      <text:p text:style-name="P79"><text:soft-page-break/>Enfin, nous avons développé ce projet en utilisant le langage Python ainsi que le module Pygame. Ce choix nous a permis de découvrir et d’utiliser une nouvelle technologie tout en restant dans un environnement de développement accessible et adapté à nos compétences actuelles.</text:p>
      <text:p text:style-name="P72">J’utilisais déjà le langage Python depuis la classe de première, ce qui m’a permis d’avoir certaines bases solides en programmation, notamment sur la logique algorithmique et la compréhension du code. Cependant, ce projet a été ma première véritable expérience avec le module Pygame. Découvrir cette bibliothèque a représenté un nouveau défi, car elle demande de comprendre de nouvelles fonction. Même si mes connaissances en Python m’ont aidé à mieux appréhender ces concepts, l’apprentissage de Pygame m’a parfois mis en difficulté, notamment en raison du temps nécessaire pour comprendre certaines fonctionnalités et corriger les erreurs rencontrées pendant le développement. De plus, ce projet s’est déroulé à une période où les révisions des partiels approchaient, ce qui a rendu l’organisation du travail plus complexe. Il a donc fallu apprendre à gérer mon temps entre l’avancement du projet, les phases de test et les révisions personnelles. Malgré ces difficultés, cette expérience m’a permis de développer de nouvelles compétences techniques, mais aussi d’améliorer ma capacité à comprendre un nouveau module et à m’adapter face à des problèmes techniques. </text:p>
      <text:p text:style-name="P72"/>
      <text:p text:style-name="P71">Malgré les différentes contraintes rencontrées au cours du projet, je suis fier du travail que j’ai pu réaliser et de ma contribution au sein de l’équipe. Entre la découverte de nouvelles technologies, les problèmes techniques à résoudre et la période des révisions des partiels, ce projet m’a demandé beaucoup d’organisation et d’investissement personnel. Il m’a également permis d’utiliser plusieurs outils différents, aussi bien pour la création graphique avec Pixilart que pour le développement avec Python, Pygame et la gestion du projet via GitHub. Grâce à cette expérience, j’ai acquis davantage de connaissances aussi bien dans le domaine du développement que dans celui du travail collaboratif et de l’organisation d’un projet informatique. J’ai notamment appris à mieux créer un jeu vidéo, à intégrer des éléments graphiques dans un programme et à travailler avec de nouveaux outils. Toutes ces compétences pourront me servir dans mes futurs projets scolaires, personnels ou même professionnels, car elles constituent une première expérience concrète dans le développement d’un projet informatique complet. </text:p>
      <text:p text:style-name="P59"/>
      <text:h text:style-name="P55" text:outline-level="2"><text:bookmark-start text:name="__RefHeading___Toc2446_120380737"/><text:tab/><text:span text:style-name="T5">c. Corentin Fareneau</text:span><text:bookmark-end text:name="__RefHeading___Toc2446_120380737"/></text:h>
      <text:p text:style-name="P76"/>
      <text:p text:style-name="P44"><text:span text:style-name="T29">Au sein de l’équipe, j’ai principalement occupé les rôles de Game Designer et de rapporteur. J’ai également contribué au développement du projet en programmant la classe </text:span><text:span text:style-name="Emphasis"><text:span text:style-name="T29">Plateforme</text:span></text:span><text:span text:style-name="T29">.</text:span></text:p>
      <text:p text:style-name="P45">En tant que Game Designer, mon rôle consistait à expliquer de manière claire et précise à mes camarades les objectifs attendus du projet ainsi que l’univers et l’histoire du jeu. Je devais veiller à ce <text:soft-page-break/>que chacun comprenne la direction générale afin de garantir une cohérence dans le développement. J’ai également participé à l’organisation des différents sprints en répartissant les tâches et en orientant mes camarades sur le travail à effectuer selon les priorités du projet.</text:p>
      <text:p text:style-name="P45">Mon rôle de rapporteur m’a amené à retranscrire l’ensemble de notre travail dans le rapport de projet. Cette mission m’a demandé de structurer les informations, de détailler les étapes de développement et d’expliquer les choix techniques et organisationnels réalisés par l’équipe. Cela m’a permis de développer mes compétences rédactionnelles et de mieux comprendre l’importance d’une documentation claire dans un projet informatique.</text:p>
      <text:p text:style-name="Text_20_body"><text:span text:style-name="T59">Sur le plan technique, ce projet m’a permis de redécouvrir le langage Python, que je n’avais plus pratiqué depuis le lycée, mais aussi d’apprendre à utiliser la bibliothèque Pygame. Grâce à la création de la classe </text:span><text:span text:style-name="Emphasis"><text:span text:style-name="T59">Plateforme</text:span></text:span><text:span text:style-name="T59">, j’ai participé à la gestion des déplacements et des interactions dans le jeu. J’ai ainsi découvert le fonctionnement de plusieurs outils spécifiques à Pygame, notamment la gestion des sprites et des collisions.</text:span></text:p>
      <text:p text:style-name="P45">J’ai cependant rencontré certaines difficultés liées à ma méconnaissance initiale de certaines fonctionnalités propres à Pygame, comme l’utilisation des sprites. J’ai dû effectuer plusieurs recherches et essais avant de comprendre correctement leur fonctionnement et leur intégration dans le projet. De plus, j’ai rencontré un problème concernant les plateformes du jeu : les images utilisées étaient au format carré alors que les plateformes devaient être rectangulaires. J’ai donc dû modifier les dimensions des images afin qu’elles correspondent mieux au rendu attendu, ce qui a permis de corriger rapidement ce problème d’affichage.</text:p>
      <text:p text:style-name="P46">Au sein de l’équipe, la communication est primordiale afin d’être au clair sur l’avancé de notre projet. Nous avons mis en place un discord pour pouvoir communiquer sur les étapes importantes restantes et nous partager les documents nécessaires à la mise en place du rapport.</text:p>
      <text:p text:style-name="P46">Je suis assez fier de l’équipe et de ce qu’on a pu finaliser, même si le projet n’est pas <text:span text:style-name="T61">celui que l’on attendait, nous avons tout de même une bonne base et à partir de ce que l’on a, nous pourrions réaliser un jeu quasi fonctionnel. </text:span><text:span text:style-name="T62">Malgré cela, nous étions dans une période d’examens avec différents projets à rendre et la préparation aux partiels. Pour ma part j’avais deux gros projets à rendre pour les modules polytechniques et d’ouvertures ce qui m’a limité dans l’avancement du projet.</text:span></text:p>
      <text:p text:style-name="P80">Pour ce qui est du travail encore à fournir, il faudrait pouvoir modifier les tailles du personnages et des plateformes et centrer en zoomant sur le personnage pour gagner de la place et avoir un niveau fonctionnel. Il faudrait aussi ajouter une condition de victoire et de défaite, ainsi que les autres fonctionnalités du Backlog.</text:p>
      <text:p text:style-name="P45"><text:soft-page-break/>Ce projet m’a beaucoup apporté, aussi bien sur le plan technique qu’organisationnel. L’apprentissage de Pygame me donne désormais les bases nécessaires pour poursuivre ce projet à l’avenir et même développer mes propres jeux de manière autonome. Par ailleurs, la découverte du versioning avec Git m’a permis de mieux comprendre le travail collaboratif et les méthodes utilisées dans le développement informatique en équipe. Enfin, la rédaction du rapport et l’organisation en sprints m’ont aidé à mieux saisir l’intérêt de la méthode Scrum, notamment en matière de gestion de projet, de communication et de répartition des tâches au sein d’une équipe.</text:p>
      <text:p text:style-name="P70"/>
      <text:p text:style-name="P32"/>
      <text:h text:style-name="P49" text:outline-level="1"><text:bookmark-start text:name="__RefHeading___Toc2448_120380737"/><text:span text:style-name="T34">V- Documents Supplémentaires</text:span><text:bookmark-end text:name="__RefHeading___Toc2448_120380737"/></text:h>
      <text:h text:style-name="Heading_20_2" text:outline-level="2"><text:bookmark-start text:name="__RefHeading___Toc2450_120380737"/><text:span text:style-name="T51"><text:tab/></text:span><text:span text:style-name="T5">a.diagramme</text:span><text:span text:style-name="T11">s</text:span><text:bookmark-end text:name="__RefHeading___Toc2450_120380737"/></text:h>
      <text:p text:style-name="P28"><draw:frame draw:style-name="fr3" draw:name="Image1" text:anchor-type="char" svg:width="17.59cm" svg:height="10.391cm" draw:z-index="54"><draw:image xlink:href="Pictures/1000020100000ACC00000784EA127AEA3AE426CA.png" xlink:type="simple" xlink:show="embed" xlink:actuate="onLoad" loext:mime-type="image/png"/></draw:frame></text:p>
      <text:p text:style-name="P28"/>
      <text:p text:style-name="P28"><draw:frame draw:style-name="fr2" draw:name="Image2" text:anchor-type="char" svg:x="2.237cm" svg:y="0.478cm" svg:width="13.813cm" svg:height="16.935cm" draw:z-index="55"><draw:image xlink:href="Pictures/10000201000005EC00000828257B49CBA311D0A8.png" xlink:type="simple" xlink:show="embed" xlink:actuate="onLoad" loext:mime-type="image/png"/></draw:frame><text:soft-page-break/></text:p>
      <text:p text:style-name="P28"/>
      <text:p text:style-name="P28"/>
      <text:p text:style-name="P28"/>
      <text:p text:style-name="P28"><text:soft-page-break/></text:p>
      <text:p text:style-name="P28"/>
      <text:p text:style-name="P28"><draw:frame draw:style-name="fr1" draw:name="Image3" text:anchor-type="char" svg:width="17.59cm" svg:height="16.318cm" draw:z-index="56"><draw:image xlink:href="Pictures/1000020100000870000007D42BD946A5F9290E70.png" xlink:type="simple" xlink:show="embed" xlink:actuate="onLoad" loext:mime-type="image/png"/></draw:frame></text:p>
      <text:p text:style-name="P28"/>
      <text:p text:style-name="P28"/>
      <text:p text:style-name="P28"/>
      <text:h text:style-name="Heading_20_2" text:outline-level="2"><text:bookmark-start text:name="__RefHeading___Toc2452_120380737"/><text:soft-page-break/><text:s text:c="5"/><text:span text:style-name="T24">b.GitHub</text:span><text:bookmark-end text:name="__RefHeading___Toc2452_120380737"/></text:h>
      <text:p text:style-name="P64"/>
      <text:p text:style-name="P27"><text:span text:style-name="T60">Git Hub</text:span> publique</text:p>
      <text:p text:style-name="P27"/>
      <text:p text:style-name="P2"><text:a xlink:type="simple" xlink:href="https://github.com/Gabbro-EXIA/PygamePLatformerDevApp.git" text:style-name="Internet_20_link" text:visited-style-name="Visited_20_Internet_20_Link"><text:span text:style-name="T52">https://github.com/Gabbro-EXIA/PygamePLatformerDevApp.git</text:span></text:a></text:p>
      <text:p text:style-name="P68"/>
      <text:h text:style-name="Heading_20_2" text:outline-level="2"><text:span text:style-name="T52"><text:tab/></text:span><text:span text:style-name="T17">c.vidéo</text:span><text:span text:style-name="T53"> </text:span></text:h>
      <text:p text:style-name="P2"/>
      <text:p text:style-name="P2"><text:a xlink:type="simple" xlink:href="https://filesender.renater.fr/?s=download&amp;token=cc595436-3eeb-4358-a087-66888b022c71" office:target-frame-name="_blank" xlink:show="new" text:style-name="Internet_20_link" text:visited-style-name="Visited_20_Internet_20_Link"><text:span text:style-name="T63">https://filesender.renater.fr/?s=download&amp;token=cc595436-3eeb-4358-a087-66888b022c71</text:span></text:a> </text:p>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inherit" svg:font-family="inherit"/>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a933"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ff0000" fo:font-size="14pt" fo:language="fr" fo:country="FR" officeooo:rsid="001d5519" style:font-size-asian="14pt" style:font-size-complex="14pt"/>
    </style:style>
    <style:style style:name="MP2" style:family="paragraph">
      <style:paragraph-properties fo:text-align="center"/>
    </style:style>
    <style:style style:name="MP3" style:family="paragraph" style:parent-style-name="Standard">
      <style:text-properties fo:language="fr" fo:country="FR" officeooo:rsid="001fbcda" officeooo:paragraph-rsid="001d5519"/>
    </style:style>
    <style:style style:name="MP4" style:family="paragraph" style:parent-style-name="Footer">
      <style:paragraph-properties fo:text-align="start" style:justify-single-word="false"/>
      <style:text-properties officeooo:rsid="001d5519" officeooo:paragraph-rsid="001d5519"/>
    </style:style>
    <style:style style:name="MT1" style:family="text">
      <style:text-properties fo:color="#00a933" fo:font-size="14pt" fo:font-weight="bold" style:font-size-asian="14pt" style:font-weight-asian="bold" style:font-size-complex="14pt" style:font-weight-complex="bold"/>
    </style:style>
    <style:style style:name="MT2" style:family="text">
      <style:text-properties fo:color="#00a933" fo:font-weight="bold" officeooo:rsid="001d5519" style:font-weight-asian="bold" style:font-weight-complex="bold"/>
    </style:style>
    <style:style style:name="MT3" style:family="text">
      <style:text-properties fo:color="#00a933" officeooo:rsid="001d5519"/>
    </style:style>
    <style:style style:name="MT4" style:family="text">
      <style:text-properties fo:color="#000000" officeooo:rsid="001d5519"/>
    </style:style>
    <style:style style:name="MT5" style:family="text">
      <style:text-properties fo:language="fr" fo:country="FR" officeooo:rsid="001fbcda"/>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61cm" fo:margin-right="0.161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éveloppement d’applications</text:p>
        <text:p text:style-name="MP1"><draw:line text:anchor-type="paragraph" draw:z-index="53" draw:name="Forme2_0" draw:style-name="Mgr1" draw:text-style-name="MP2" svg:x1="-0.174cm" svg:y1="0.585cm" svg:x2="17.421cm" svg:y2="0.559cm"><text:p/></draw:line></text:p>
      </style:header>
      <style:footer>
        <text:p text:style-name="MP3"><draw:line text:anchor-type="paragraph" draw:z-index="17" draw:name="Forme1" draw:style-name="Mgr1" draw:text-style-name="MP2" svg:x1="0.011cm" svg:y1="23.841cm" svg:x2="17.526cm" svg:y2="23.841cm"><text:p/></draw:line><draw:line text:anchor-type="paragraph" draw:z-index="35" draw:name="Forme2" draw:style-name="Mgr1" draw:text-style-name="MP2" svg:x1="0.064cm" svg:y1="0.135cm" svg:x2="17.659cm" svg:y2="0.109cm"><text:p/></draw:line></text:p>
        <text:p text:style-name="MP3">Fareneau Corentin<text:tab/><text:tab/><text:tab/><text:tab/><text:tab/><text:tab/><text:tab/><text:tab/></text:p>
        <text:p text:style-name="MP3">Poulias Milan<text:tab/><text:tab/><text:tab/><text:tab/><text:tab/> <text:s text:c="7"/><text:span text:style-name="MT1"><text:page-number text:select-page="current">18</text:page-number></text:span><text:span text:style-name="MT1">/</text:span><text:span text:style-name="MT1"><text:page-count>18</text:page-count></text:span><text:span text:style-name="MT2"><text:tab/></text:span><text:span text:style-name="MT3"><text:tab/><text:tab/><text:tab/> <text:s text:c="8"/></text:span><text:span text:style-name="MT4">Robert Tomczak</text:span></text:p>
        <text:p text:style-name="MP4"><text:span text:style-name="MT5">Lobry Thibault </text:span><text:tab/></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6-05-19T17:43:21.333000000</meta:creation-date>
    <meta:editing-duration>PT2H8M58S</meta:editing-duration>
    <meta:editing-cycles>38</meta:editing-cycles>
    <meta:generator>LibreOffice/6.4.3.2$Windows_X86_64 LibreOffice_project/747b5d0ebf89f41c860ec2a39efd7cb15b54f2d8</meta:generator>
    <dc:date>2026-05-19T20:34:20.753000000</dc:date>
    <meta:document-statistic meta:table-count="2" meta:image-count="3" meta:object-count="0" meta:page-count="18" meta:paragraph-count="220" meta:word-count="4218" meta:character-count="26449" meta:non-whitespace-character-count="22312"/>
  </office:meta>
</office:document-meta>
</file>