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9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fbcda" officeooo:paragraph-rsid="001fbcda"/>
    </style:style>
    <style:style style:name="P2" style:family="paragraph" style:parent-style-name="Standard">
      <style:paragraph-properties fo:text-align="center" style:justify-single-word="false"/>
      <style:text-properties fo:font-size="36pt" officeooo:rsid="001fbcda" officeooo:paragraph-rsid="001fbcda" style:font-size-asian="31.5pt" style:font-size-complex="36pt"/>
    </style:style>
    <style:style style:name="P3" style:family="paragraph" style:parent-style-name="Standard">
      <style:paragraph-properties fo:text-align="center" style:justify-single-word="false"/>
      <style:text-properties fo:font-size="36pt" officeooo:rsid="0024d86e" officeooo:paragraph-rsid="0024d86e" style:font-size-asian="31.5pt" style:font-size-complex="36pt"/>
    </style:style>
    <style:style style:name="P4" style:family="paragraph" style:parent-style-name="Standard">
      <style:paragraph-properties fo:text-align="center" style:justify-single-word="false"/>
      <style:text-properties fo:font-size="16pt" officeooo:rsid="001fbcda" officeooo:paragraph-rsid="001fbcda" style:font-size-asian="14pt" style:font-size-complex="16pt"/>
    </style:style>
    <style:style style:name="P5" style:family="paragraph" style:parent-style-name="Standard">
      <style:paragraph-properties fo:text-align="end" style:justify-single-word="false"/>
      <style:text-properties fo:font-size="16pt" officeooo:rsid="001fbcda" officeooo:paragraph-rsid="001fbcda" style:font-size-asian="14pt" style:font-size-complex="16pt"/>
    </style:style>
    <style:style style:name="P6" style:family="paragraph" style:parent-style-name="Standard">
      <style:text-properties fo:font-size="16pt" officeooo:rsid="001fbcda" officeooo:paragraph-rsid="001fbcda" style:font-size-asian="16pt" style:font-size-complex="16pt"/>
    </style:style>
    <style:style style:name="P7" style:family="paragraph" style:parent-style-name="Standard">
      <style:paragraph-properties fo:margin-top="0cm" fo:margin-bottom="0cm" style:contextual-spacing="false" fo:line-height="100%" fo:text-align="start" style:justify-single-word="false" fo:orphans="2" fo:widows="2">
        <style:tab-stops>
          <style:tab-stop style:position="2.473cm" style:type="center"/>
        </style:tab-stops>
      </style:paragraph-properties>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writing-mode="rl-tb"/>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10" style:family="paragraph" style:parent-style-name="Standard">
      <style:paragraph-properties fo:text-align="start" style:justify-single-word="false"/>
      <style:text-properties fo:font-size="12pt" officeooo:rsid="001fbcda" officeooo:paragraph-rsid="001fbcda" style:font-size-asian="10.5pt" style:font-size-complex="12pt"/>
    </style:style>
    <style:style style:name="P11" style:family="paragraph" style:parent-style-name="Standard">
      <style:text-properties fo:font-size="12pt" officeooo:rsid="001fbcda" officeooo:paragraph-rsid="001fbcda" style:font-size-asian="10.5pt" style:font-size-complex="12pt"/>
    </style:style>
    <style:style style:name="P12" style:family="paragraph" style:parent-style-name="Standard">
      <style:text-properties fo:font-size="12pt" officeooo:rsid="002101d2" officeooo:paragraph-rsid="002101d2" style:font-size-asian="10.5pt" style:font-size-complex="12pt"/>
    </style:style>
    <style:style style:name="P13" style:family="paragraph" style:parent-style-name="Standard">
      <style:text-properties fo:font-size="12pt" officeooo:rsid="0022cd70" officeooo:paragraph-rsid="002101d2" style:font-size-asian="10.5pt" style:font-size-complex="12pt"/>
    </style:style>
    <style:style style:name="P14" style:family="paragraph" style:parent-style-name="Standard">
      <style:text-properties fo:font-size="12pt" officeooo:rsid="0022cd70" officeooo:paragraph-rsid="0022cd70" style:font-size-asian="10.5pt" style:font-size-complex="12pt"/>
    </style:style>
    <style:style style:name="P15" style:family="paragraph" style:parent-style-name="Standard">
      <style:text-properties fo:font-size="12pt" officeooo:rsid="0023b976" officeooo:paragraph-rsid="0023b976" style:font-size-asian="10.5pt" style:font-size-complex="12pt"/>
    </style:style>
    <style:style style:name="P16" style:family="paragraph" style:parent-style-name="Standard">
      <style:text-properties fo:font-size="12pt" officeooo:rsid="00240f3e" officeooo:paragraph-rsid="00240f3e" style:font-size-asian="10.5pt" style:font-size-complex="12pt"/>
    </style:style>
    <style:style style:name="P17" style:family="paragraph" style:parent-style-name="Standard">
      <style:text-properties fo:font-size="12pt" officeooo:rsid="0024ca25" officeooo:paragraph-rsid="0024ca25" style:font-size-asian="10.5pt" style:font-size-complex="12pt"/>
    </style:style>
    <style:style style:name="P18" style:family="paragraph" style:parent-style-name="Standard">
      <style:text-properties fo:font-size="12pt" officeooo:rsid="00263a06" officeooo:paragraph-rsid="00263a06" style:font-size-asian="10.5pt" style:font-size-complex="12pt"/>
    </style:style>
    <style:style style:name="P19" style:family="paragraph" style:parent-style-name="Standard">
      <style:text-properties fo:font-size="12pt" officeooo:rsid="0026f90a" officeooo:paragraph-rsid="0026f90a" style:font-size-asian="10.5pt" style:font-size-complex="12pt"/>
    </style:style>
    <style:style style:name="P20" style:family="paragraph" style:parent-style-name="Standard">
      <style:paragraph-properties fo:text-align="start" style:justify-single-word="false"/>
      <style:text-properties fo:font-size="12pt" officeooo:rsid="0028c805" officeooo:paragraph-rsid="0028c805" style:font-size-asian="10.5pt" style:font-size-complex="12pt"/>
    </style:style>
    <style:style style:name="P21" style:family="paragraph" style:parent-style-name="Standard">
      <style:text-properties fo:font-size="12pt" officeooo:rsid="00295d08" officeooo:paragraph-rsid="00295d08" style:font-size-asian="10.5pt" style:font-size-complex="12pt"/>
    </style:style>
    <style:style style:name="P22" style:family="paragraph" style:parent-style-name="Standard">
      <style:text-properties fo:font-size="12pt" officeooo:rsid="002c47a5" officeooo:paragraph-rsid="002c47a5" style:font-size-asian="10.5pt" style:font-size-complex="12pt"/>
    </style:style>
    <style:style style:name="P23" style:family="paragraph" style:parent-style-name="Standard">
      <style:paragraph-properties fo:text-align="start" style:justify-single-word="false"/>
      <style:text-properties fo:font-size="12pt" officeooo:rsid="001fbcda" officeooo:paragraph-rsid="001fbcda" style:font-size-asian="12pt" style:font-size-complex="12pt"/>
    </style:style>
    <style:style style:name="P24" style:family="paragraph" style:parent-style-name="Standard">
      <style:text-properties officeooo:paragraph-rsid="001fbcda"/>
    </style:style>
    <style:style style:name="P25" style:family="paragraph" style:parent-style-name="Standard">
      <style:text-properties fo:font-size="12pt" officeooo:rsid="002fdaca" officeooo:paragraph-rsid="002fdaca" style:font-size-asian="10.5pt" style:font-size-complex="12pt"/>
    </style:style>
    <style:style style:name="T1" style:family="text">
      <style:text-properties officeooo:rsid="0023b976"/>
    </style:style>
    <style:style style:name="T2" style:family="text">
      <style:text-properties officeooo:rsid="00240f3e"/>
    </style:style>
    <style:style style:name="T3" style:family="text">
      <style:text-properties style:text-position="super 58%"/>
    </style:style>
    <style:style style:name="T4" style:family="text">
      <style:text-properties officeooo:rsid="0026f90a"/>
    </style:style>
    <style:style style:name="T5" style:family="text">
      <style:text-properties officeooo:rsid="0026fe36"/>
    </style:style>
    <style:style style:name="T6" style:family="text">
      <style:text-properties officeooo:rsid="002ced40"/>
    </style:style>
    <style:style style:name="T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reneau Corentin<text:tab/><text:tab/><text:tab/><text:tab/><text:tab/><text:tab/><text:tab/><text:tab/>Licence 2 Informatique</text:p>
      <text:p text:style-name="P1">Poulias Milan</text:p>
      <text:p text:style-name="P1">Lobry Thibault </text:p>
      <text:p text:style-name="P1"/>
      <text:p text:style-name="P1"/>
      <text:p text:style-name="P1"/>
      <text:p text:style-name="P1"/>
      <text:p text:style-name="P1"/>
      <text:p text:style-name="P2">Développement d’applications</text:p>
      <text:p text:style-name="P2">-</text:p>
      <text:p text:style-name="P2"/>
      <text:p text:style-name="P2">Plateformer</text:p>
      <text:p text:style-name="P3">Astronaut Rescuer</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5">Au Mont-Houy, UPHF</text:p>
      <text:p text:style-name="P5">Année Universitaire 2025-2026</text:p>
      <text:p text:style-name="P5">Robert Tomczak</text:p>
      <text:p text:style-name="P10"><text:soft-page-break/>résumé : </text:p>
      <text:p text:style-name="P10"/>
      <text:p text:style-name="P10">Création d’un jeu de type plateforme avec comme particularité une gravité changeante par niveau et des niveaux à double sens.</text:p>
      <text:p text:style-name="P10"/>
      <text:p text:style-name="P10">table des matières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ans le cadre du projet de soutenance du module : Développement d’applications, nous allons créer un jeu.</text:p>
      <text:p text:style-name="P10">Le projet a été mené selon une approche Agile de type SCRUM, avec un périmètre ajusté au fil des itérations. </text:p>
      <text:p text:style-name="P10"/>
      <text:p text:style-name="P20">Objectifs et finalités du projets : avoir un niveau fonctionnel avec les élément de gameplay spécifique.</text:p>
      <text:p text:style-name="P20"/>
      <text:p text:style-name="P20">Limites </text:p>
      <text:p text:style-name="P10"/>
      <text:p text:style-name="P23">Backlog : </text:p>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8">Fonctionnalité</text:p>
          </table:table-cell>
          <table:table-cell table:style-name="Tableau1.A1" office:value-type="string">
            <text:p text:style-name="P8">User story</text:p>
          </table:table-cell>
          <table:table-cell table:style-name="Tableau1.A1" office:value-type="string">
            <text:p text:style-name="P8">Critère d’acceptation</text:p>
          </table:table-cell>
        </table:table-row>
        <table:table-row table:style-name="Tableau1.1">
          <table:table-cell table:style-name="Tableau1.A1" office:value-type="string">
            <text:p text:style-name="P8">Se déplacer</text:p>
          </table:table-cell>
          <table:table-cell table:style-name="Tableau1.A1" office:value-type="string">
            <text:p text:style-name="P8">En tant que joueur, je veux me déplacer afin de parcourir le niveau</text:p>
          </table:table-cell>
          <table:table-cell table:style-name="Tableau1.A1" office:value-type="string">
            <text:p text:style-name="P8">Déplacement en rapport avec la touche pressée</text:p>
            <text:p text:style-name="P8">S’arrêter quand on rencontre un obstacle</text:p>
            <text:p text:style-name="P8">Tomber quand il y a un trou (gravité)</text:p>
          </table:table-cell>
        </table:table-row>
        <table:table-row table:style-name="Tableau1.1">
          <table:table-cell table:style-name="Tableau1.A1" office:value-type="string">
            <text:p text:style-name="P9">Quitter le jeu</text:p>
          </table:table-cell>
          <table:table-cell table:style-name="Tableau1.A1" office:value-type="string">
            <text:p text:style-name="P8">En tant que joueur, je veux accéder à un menu afin de quitter le jeu</text:p>
          </table:table-cell>
          <table:table-cell table:style-name="Tableau1.A1" office:value-type="string">
            <text:p text:style-name="P8">Touche pour ouvrir un menu</text:p>
            <text:p text:style-name="P8">Bouton pour quitter le jeu</text:p>
          </table:table-cell>
        </table:table-row>
        <table:table-row table:style-name="Tableau1.1">
          <table:table-cell table:style-name="Tableau1.A1" office:value-type="string">
            <text:p text:style-name="P8">Gagner/Perdre</text:p>
          </table:table-cell>
          <table:table-cell table:style-name="Tableau1.A1" office:value-type="string">
            <text:p text:style-name="P8">En tant que joueur, je veux savoir quand je <text:s/>perds/gagne afin de m’adapter/progresser</text:p>
          </table:table-cell>
          <table:table-cell table:style-name="Tableau1.A1" office:value-type="string">
            <text:p text:style-name="P8">Message « Game over »/ « Gagné »</text:p>
            <text:p text:style-name="P8">Recommencer au début du niveau</text:p>
            <text:p text:style-name="P8">Pouvoir finir le niveau (niveau possible)</text:p>
          </table:table-cell>
        </table:table-row>
        <table:table-row table:style-name="Tableau1.1">
          <table:table-cell table:style-name="Tableau1.A1" office:value-type="string">
            <text:p text:style-name="P7">Différencier le personnage et les décors</text:p>
          </table:table-cell>
          <table:table-cell table:style-name="Tableau1.A1" office:value-type="string">
            <text:p text:style-name="P8">En tant que joueur, je veux reconnaitre mon personnage afin de faciliter mon expérience</text:p>
          </table:table-cell>
          <table:table-cell table:style-name="Tableau1.A1" office:value-type="string">
            <text:p text:style-name="P8">Formes différentes</text:p>
            <text:p text:style-name="P8">Couleurs différentes</text:p>
          </table:table-cell>
        </table:table-row>
        <table:table-row table:style-name="Tableau1.1">
          <table:table-cell table:style-name="Tableau1.A1" office:value-type="string">
            <text:p text:style-name="P8">Lire mon temps dans un niveau</text:p>
          </table:table-cell>
          <table:table-cell table:style-name="Tableau1.A1" office:value-type="string">
            <text:p text:style-name="P8">En tant que joueur, je veux connaitre le temps de complétion du niveau afin de connaitre ma performance</text:p>
          </table:table-cell>
          <table:table-cell table:style-name="Tableau1.A1" office:value-type="string">
            <text:p text:style-name="P8">Message à la fin du niveau avec mon temps</text:p>
            <text:p text:style-name="P8"/>
          </table:table-cell>
        </table:table-row>
        <table:table-row table:style-name="Tableau1.1">
          <table:table-cell table:style-name="Tableau1.A1" office:value-type="string">
            <text:p text:style-name="P8">Se battre contre des ennemis</text:p>
          </table:table-cell>
          <table:table-cell table:style-name="Tableau1.A1" office:value-type="string">
            <text:p text:style-name="P8">En tant que joueur, je veux rencontrer des adversaires afin d’augmenter la difficulté</text:p>
          </table:table-cell>
          <table:table-cell table:style-name="Tableau1.A1" office:value-type="string">
            <text:p text:style-name="P8">Objet pour détruire des ennemis</text:p>
            <text:p text:style-name="P8">Rencontre d’ennemis aléatoire</text:p>
          </table:table-cell>
        </table:table-row>
        <table:table-row table:style-name="Tableau1.1">
          <table:table-cell table:style-name="Tableau1.A1" office:value-type="string">
            <text:p text:style-name="P8">Ramasser des objets</text:p>
          </table:table-cell>
          <table:table-cell table:style-name="Tableau1.A1" office:value-type="string">
            <text:p text:style-name="P8">En tant que joueur, je veux ramasser des objets afin d’obtenir des bonus</text:p>
          </table:table-cell>
          <table:table-cell table:style-name="Tableau1.A1" office:value-type="string">
            <text:p text:style-name="P8">Bouton/Touche pour ramasser objet</text:p>
          </table:table-cell>
        </table:table-row>
        <table:table-row table:style-name="Tableau1.1">
          <table:table-cell table:style-name="Tableau1.A1" office:value-type="string">
            <text:p text:style-name="P8">Lire la vie restante</text:p>
          </table:table-cell>
          <table:table-cell table:style-name="Tableau1.A1" office:value-type="string">
            <text:p text:style-name="P8">En tant que joueur, je veux connaitre ma vie afin d’adapter mon style de jeu</text:p>
          </table:table-cell>
          <table:table-cell table:style-name="Tableau1.A1" office:value-type="string">
            <text:p text:style-name="P8">Boite avec une barre de vie</text:p>
            <text:p text:style-name="P8">Perdre de la vie quand un ennemi nous touche</text:p>
          </table:table-cell>
        </table:table-row>
        <table:table-row table:style-name="Tableau1.1">
          <table:table-cell table:style-name="Tableau1.A1" office:value-type="string">
            <text:p text:style-name="P8">S’immerger dans le monde</text:p>
          </table:table-cell>
          <table:table-cell table:style-name="Tableau1.A1" office:value-type="string">
            <text:p text:style-name="P8">En tant que joueur, je veux m’immerger dans le monde afin de profiter de <text:soft-page-break/>l’expérience</text:p>
          </table:table-cell>
          <table:table-cell table:style-name="Tableau1.A1" office:value-type="string">
            <text:p text:style-name="P8">Histoire intéressante</text:p>
            <text:p text:style-name="P8">Décors, ennemis, personnages, sons <text:soft-page-break/>cohérents</text:p>
            <text:p text:style-name="P8"/>
          </table:table-cell>
        </table:table-row>
        <table:table-row table:style-name="Tableau1.1">
          <table:table-cell table:style-name="Tableau1.A1" office:value-type="string">
            <text:p text:style-name="P8">Choisir son skin</text:p>
          </table:table-cell>
          <table:table-cell table:style-name="Tableau1.A1" office:value-type="string">
            <text:p text:style-name="P8">En tant que joueur, je veux personnaliser mon avatar afin d’adapter mon personnage à mes désirs</text:p>
          </table:table-cell>
          <table:table-cell table:style-name="Tableau1.A1" office:value-type="string">
            <text:p text:style-name="P8">Menu pour choisir son avatar</text:p>
            <text:p text:style-name="P8">Débloquer des skins en finissant des niveaux</text:p>
          </table:table-cell>
        </table:table-row>
        <table:table-row table:style-name="Tableau1.1">
          <table:table-cell table:style-name="Tableau1.A1" office:value-type="string">
            <text:p text:style-name="P8">Avoir une monnaie de jeu</text:p>
          </table:table-cell>
          <table:table-cell table:style-name="Tableau1.A1" office:value-type="string">
            <text:p text:style-name="P8">En tant que joueur, je veux gagner une monnaie de jeu afin d’acheter des bonus</text:p>
          </table:table-cell>
          <table:table-cell table:style-name="Tableau1.A1" office:value-type="string">
            <text:p text:style-name="P8">Menu « portemonnaie »</text:p>
            <text:p text:style-name="P8">Compteur qui évolue avec le nombre de devise ramassée</text:p>
          </table:table-cell>
        </table:table-row>
      </table:table>
      <text:p text:style-name="P10"/>
      <text:p text:style-name="P10">MVP </text:p>
      <text:p text:style-name="P10"/>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8">Fonctionnalité</text:p>
          </table:table-cell>
          <table:table-cell table:style-name="Tableau2.A1" office:value-type="string">
            <text:p text:style-name="P8">User Story</text:p>
          </table:table-cell>
          <table:table-cell table:style-name="Tableau2.A1" office:value-type="string">
            <text:p text:style-name="P8">Critères d’acceptation</text:p>
          </table:table-cell>
        </table:table-row>
        <table:table-row table:style-name="Tableau2.1">
          <table:table-cell table:style-name="Tableau2.A1" office:value-type="string">
            <text:p text:style-name="P8">Se déplacer</text:p>
          </table:table-cell>
          <table:table-cell table:style-name="Tableau2.A1" office:value-type="string">
            <text:p text:style-name="P8">En tant que joueur, je veux me déplacer afin de parcourir le niveau</text:p>
          </table:table-cell>
          <table:table-cell table:style-name="Tableau2.A1" office:value-type="string">
            <text:p text:style-name="P8">Déplacement en rapport avec la touche pressée</text:p>
            <text:p text:style-name="P8">S’arrêter quand on rencontre un obstacle</text:p>
            <text:p text:style-name="P8">Tomber quand il y a un trou (gravité)</text:p>
          </table:table-cell>
        </table:table-row>
        <table:table-row table:style-name="Tableau2.1">
          <table:table-cell table:style-name="Tableau2.A1" office:value-type="string">
            <text:p text:style-name="P8">Quitter le jeu</text:p>
          </table:table-cell>
          <table:table-cell table:style-name="Tableau2.A1" office:value-type="string">
            <text:p text:style-name="P8">En tant que joueur, je veux accéder à un menu afin de quitter le jeu</text:p>
          </table:table-cell>
          <table:table-cell table:style-name="Tableau2.A1" office:value-type="string">
            <text:p text:style-name="P8">Touche pour ouvrir un menu</text:p>
            <text:p text:style-name="P8">Bouton pour quitter le jeu</text:p>
          </table:table-cell>
        </table:table-row>
        <table:table-row table:style-name="Tableau2.1">
          <table:table-cell table:style-name="Tableau2.A1" office:value-type="string">
            <text:p text:style-name="P8">Gagner/Perdre</text:p>
          </table:table-cell>
          <table:table-cell table:style-name="Tableau2.A1" office:value-type="string">
            <text:p text:style-name="P8">En tant que joueur, je veux savoir quand je <text:s/>perds/gagne afin de m’adapter/progresser</text:p>
          </table:table-cell>
          <table:table-cell table:style-name="Tableau2.A1" office:value-type="string">
            <text:p text:style-name="P8">Message « Game over »/ « Gagné »</text:p>
            <text:p text:style-name="P8">Recommencer au début du niveau</text:p>
            <text:p text:style-name="P8">Pouvoir finir le niveau (niveau possible)</text:p>
          </table:table-cell>
        </table:table-row>
        <table:table-row table:style-name="Tableau2.1">
          <table:table-cell table:style-name="Tableau2.A1" office:value-type="string">
            <text:p text:style-name="P8">Différencier le personnage et les décors</text:p>
          </table:table-cell>
          <table:table-cell table:style-name="Tableau2.A1" office:value-type="string">
            <text:p text:style-name="P8">En tant que joueur, je veux reconnaitre mon personnage afin de faciliter mon expérience</text:p>
          </table:table-cell>
          <table:table-cell table:style-name="Tableau2.A1" office:value-type="string">
            <text:p text:style-name="P8">Formes différentes</text:p>
            <text:p text:style-name="P8">Couleurs différentes</text:p>
          </table:table-cell>
        </table:table-row>
        <table:table-row table:style-name="Tableau2.1">
          <table:table-cell table:style-name="Tableau2.A1" office:value-type="string">
            <text:p text:style-name="P8">Lire la vie restante</text:p>
          </table:table-cell>
          <table:table-cell table:style-name="Tableau2.A1" office:value-type="string">
            <text:p text:style-name="P8">En tant que joueur, je veux connaitre ma vie afin d’adapter mon style de jeu</text:p>
          </table:table-cell>
          <table:table-cell table:style-name="Tableau2.A1" office:value-type="string">
            <text:p text:style-name="P8">Boite avec une barre de vie</text:p>
            <text:p text:style-name="P8">Perdre de la vie quand un ennemi nous touche</text:p>
          </table:table-cell>
        </table:table-row>
      </table:table>
      <text:p text:style-name="P24"/>
      <text:p text:style-name="P24"/>
      <text:p text:style-name="P24"/>
      <text:p text:style-name="P6">Astronaut Rescuer : </text:p>
      <text:p text:style-name="P6"/>
      <text:p text:style-name="P11">C’est un jeu de type plateforme <text:span text:style-name="T1">RPG </text:span>de type « die and retry » à écran unique développé sur pygame, et jouable sur PC.</text:p>
      <text:p text:style-name="P11"/>
      <text:p text:style-name="P11">Dans un futur proche, l’Humain a réussi à maîtriser le voyage spatial et s’en sert pour récolter tout types de ressources sur les planètes qu’il a découvert. Malheureusement, il arrive que ces récolteurs de ressources (aussi humains) ne puisse plus s’extraire de la planète car ils se sont blessés, se sont évanouis ou sont tout simplement bloqués.</text:p>
      <text:p text:style-name="P11"><text:soft-page-break/>C’est là qu’entre en scène les Astronauts Rescuers, ce sont des astronautes spécialement entraînés à chaque planète et leur gravité afin d’en secourir les récolteurs. Ils maîtrisent à la perfection les particularités de leur planète respective afin de rapatrier en toute sécurité les victimes.</text:p>
      <text:p text:style-name="P11">Mais depuis un certain temps, les interventions de secours se sont multipliés de manière anormale et les astronautes secourus n’ont plus aucun souvenir de ce qui leur est arrivé… </text:p>
      <text:p text:style-name="P11">Quelque chose se cache dans l’ombre de nos secouristes et ils auront alors besoin d’enquêter sur les raisons de cette anomalie.</text:p>
      <text:p text:style-name="P11">Le joueur sera alors plongé dans le corps de nos secouristes, dans des niveaux et des mondes correspondants à différentes planètes et devront alors s’adapter à la gravité pour atteindre les astronautes inconscients et les ramener à la navette qui les a transportés .</text:p>
      <text:p text:style-name="P12">(Possibilité d’ajouter des niveaux à énigme pour étendre le lore) </text:p>
      <text:p text:style-name="P13"/>
      <text:p text:style-name="P14">L’objectif du joueur est de compléter le niveau 2 fois mais dans des sens opposés. En atteignant le fin du niveau celui-ci obtient un checkpoint modélisé par le corps de l’astronaute récolteur et devra alors retourner sur ses pas afin de compléter le niveau.</text:p>
      <text:p text:style-name="P14">Le niveau se finit lorsque le joueur atteint sa fusée en ayant atteint le checkpoint.</text:p>
      <text:p text:style-name="P14"/>
      <text:p text:style-name="P14"/>
      <text:p text:style-name="P14">Le joueur dispose de différentes commandes de base pour faire déplacer le personnage : </text:p>
      <text:p text:style-name="P14"/>
      <text:p text:style-name="P14">- les touches « q » et « &lt; » pour se déplacer vers la gauche,</text:p>
      <text:p text:style-name="P14">- les touches « d » et « &gt; » pour se déplacer vers la droite,</text:p>
      <text:p text:style-name="P14">- la barre espace pour sauter,</text:p>
      <text:p text:style-name="P14"/>
      <text:p text:style-name="P14">On a produit un design de personnage, de plateforme et d’arrière-plan harmonieux pour correspondre à l’univers.</text:p>
      <text:p text:style-name="P14"/>
      <text:p text:style-name="P14"/>
      <text:p text:style-name="P14">L’élément de gameplay central est le changement de gravité en fonction du niveau proposé, avec une cohérence avec le monde réel. Par exemple, la gravité sur la Lune sera moins élevé que celle sur Vénus. Aussi la particularité du jeu est le fait que les niveaux soient créés avec un double sens, c’est à dire qu’il est possible de revenir sur ses pas. (à l’avenir sur de prochains niveaux, le joueur devra être attentif à ses déplacements pour ne pas empêcher son retour, blocs à déplacés, sorties bouchées, trous à sécurisés, etc.) </text:p>
      <text:p text:style-name="P14"/>
      <text:p text:style-name="P14">Le système de récompenses et progressions n’est pas encore établi, possibilité d’ajouter une monnaie de jeu, des skins achetables, éléments à récupérer obligatoire pour continuer le jeu, etc.</text:p>
      <text:p text:style-name="P14"/>
      <text:p text:style-name="P14">Narration et univers au dessus </text:p>
      <text:p text:style-name="P14"/>
      <text:p text:style-name="P14">Personnages : </text:p>
      <text:p text:style-name="P14"><text:tab/>Prota : Astronauts rescuers</text:p>
      <text:p text:style-name="P14"><text:tab/>Anta : Vamiante (race extraterrestre qui s’adapte à chaque gravité), roi Vamiante→ veut empêcher les humains de récupérer les ressources et les envahir </text:p>
      <text:p text:style-name="P14"/>
      <text:p text:style-name="P14">Monde : </text:p>
      <text:p text:style-name="P14">Planètes dans l’ordre : Lune, Vénus, Mars, Pluton, Saturne, Uranus (pas de surface solide mais les humains ont une technologie pour marcher dessus) , Vamiantar (seule fictive, gravité changeante en fonction du niveau) </text:p>
      <text:p text:style-name="P14"/>
      <text:p text:style-name="P15">Direction artistique : </text:p>
      <text:p text:style-name="P15">Jeu de plateforme R<text:span text:style-name="T2">PG pixelisé inspiré de Super Mario Bros.</text:span></text:p>
      <text:p text:style-name="P16"><text:soft-page-break/>Le personnage principal est un astronaute avec une tenue classique blanche comme on connaît et une visière dorée.</text:p>
      <text:p text:style-name="P16"/>
      <text:p text:style-name="P22">Sound effect : </text:p>
      <text:p text:style-name="P22">- musique de fond comme si il y avait un grand vide, un peu mystérieux, <text:span text:style-name="T6">orchestral </text:span></text:p>
      <text:p text:style-name="P22">- effet de respiration de l’astronaute par dessus la musique (léger)</text:p>
      <text:p text:style-name="P22">- son de saut et atterrissage, par exemple : « Hop ! » lors du saut, souffle plus fort au moment d’atterrir</text:p>
      <text:p text:style-name="P22">- <text:s/>son des pas sur la musique.</text:p>
      <text:p text:style-name="P16"/>
      <text:p text:style-name="P16">Moteur du jeu : PyGame.</text:p>
      <text:p text:style-name="P16">Configurations requises : Pygame, Python, un compilateur.</text:p>
      <text:p text:style-name="P15"/>
      <text:p text:style-name="P17">Structure de l’équipe : </text:p>
      <text:p text:style-name="P17"/>
      <text:p text:style-name="P17">Milan : développeur principale</text:p>
      <text:p text:style-name="P17">Thibault : pixel artiste , développeur </text:p>
      <text:p text:style-name="P17">Corentin : game designer, rapporteur, développeur </text:p>
      <text:p text:style-name="P14"/>
      <text:p text:style-name="P17">Développement en sprint : </text:p>
      <text:p text:style-name="P17"/>
      <text:p text:style-name="P17">1<text:span text:style-name="T3">er</text:span> sprint : Déplacement personnage <text:span text:style-name="T5">(Milan) </text:span>+ design personnage <text:span text:style-name="T5">(Thibault)</text:span> - <text:span text:style-name="T4">4 heures</text:span></text:p>
      <text:p text:style-name="P17">2<text:span text:style-name="T3">e</text:span> sprint : intégration design et gravité <text:span text:style-name="T5">(Milan, Corentin)</text:span> + design background <text:span text:style-name="T5">(Thibault)</text:span>– <text:span text:style-name="T4">6 heures</text:span></text:p>
      <text:p text:style-name="P17">3<text:span text:style-name="T3">e</text:span> sprint : mécanique checkpoint <text:span text:style-name="T5">(all)</text:span>– <text:span text:style-name="T4">3 heures </text:span></text:p>
      <text:p text:style-name="P18">4<text:span text:style-name="T3">e</text:span> sprint : intégration design background et personnage au centre <text:span text:style-name="T5">(all)</text:span>- <text:span text:style-name="T4">6 heures </text:span></text:p>
      <text:p text:style-name="P21">5<text:span text:style-name="T3">e</text:span> sprint : intégration fonctionnalités quitter le jeu, perdre/gagner, système de vie (all) <text:tab/></text:p>
      <text:p text:style-name="P14"><text:tab/></text:p>
      <text:p text:style-name="P14"/>
      <text:p text:style-name="P19">rendu mercredi 13 mai </text:p>
      <text:p text:style-name="P19"/>
      <text:p text:style-name="P19"><text:a xlink:type="simple" xlink:href="https://github.com/Gabbro-EXIA/PygamePLatformerDevApp" text:style-name="Internet_20_link" text:visited-style-name="Visited_20_Internet_20_Link">https://github.com/Gabbro-EXIA/PygamePLatformerDevApp</text:a></text:p>
      <text:p text:style-name="P19"/>
      <text:p text:style-name="P25">Rapport 1<text:span text:style-name="T3">er</text:span> sprint : </text:p>
      <text:p text:style-name="P25"/>
      <text:p text:style-name="P25">Design du personnage jouable fini. Tout les sprites neutre, en marche et en saut sont aussi retournés (droite et gauche)</text:p>
      <text:p text:style-name="P25"/>
      <text:p text:style-name="P25">Déplacement : le personnage peut se déplacer grâce aux touches : « g » et « &lt; » pour aller à gauche, « d » et « &gt; » pour aller à droite, espace pour aller vers le haut. </text:p>
      <text:p text:style-name="P25">Problème : lorsqu’on appuie sur plusieurs touches en même temps, mais qu’on relâche en premier la deuxième touche sur laquelle on a appuyé, le personnage se bloqu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27T10:13:15.705000000</meta:creation-date>
    <dc:date>2026-04-28T10:07:25.052000000</dc:date>
    <meta:editing-duration>PT1H54M50S</meta:editing-duration>
    <meta:editing-cycles>19</meta:editing-cycles>
    <meta:generator>LibreOffice/7.6.0.3$Windows_X86_64 LibreOffice_project/69edd8b8ebc41d00b4de3915dc82f8f0fc3b6265</meta:generator>
    <meta:document-statistic meta:table-count="2" meta:image-count="0" meta:object-count="0" meta:page-count="6" meta:paragraph-count="141" meta:word-count="1426" meta:character-count="8507" meta:non-whitespace-character-count="7176"/>
  </office:meta>
</office:document-meta>
</file>